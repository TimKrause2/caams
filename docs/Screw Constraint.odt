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e36" officeooo:paragraph-rsid="000eee36"/>
    </style:style>
    <style:style style:name="P2" style:family="paragraph" style:parent-style-name="Standard">
      <style:text-properties officeooo:rsid="0015b398" officeooo:paragraph-rsid="0015b39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439cm" svg:width="2.12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439cm" svg:width="1.635cm" svg:height="0.59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y="-0.439cm" svg:width="2.043cm" svg:height="0.59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0.621cm" svg:width="2.977cm" svg:height="1.0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ct5" text:anchor-type="as-char" svg:y="-0.681cm" svg:width="4.509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6" text:anchor-type="as-char" svg:y="-0.439cm" svg:width="3.665cm" svg:height="0.59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as-char" svg:y="-0.439cm" svg:width="5.17cm" svg:height="0.59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ct13" text:anchor-type="as-char" svg:y="-0.439cm" svg:width="5.339cm" svg:height="0.59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439cm" svg:width="1.607cm" svg:height="0.59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439cm" svg:width="5.212cm" svg:height="0.59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<draw:frame draw:style-name="fr1" draw:name="Object8" text:anchor-type="as-char" svg:y="-0.439cm" svg:width="1.771cm" svg:height="0.59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18" text:anchor-type="as-char" svg:y="-0.439cm" svg:width="4.724cm" svg:height="0.594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Object9" text:anchor-type="as-char" svg:y="-0.621cm" svg:width="4.775cm" svg:height="1.00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ct16" text:anchor-type="as-char" svg:y="-0.621cm" svg:width="6.451cm" svg:height="1.00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draw:frame draw:style-name="fr1" draw:name="Object17" text:anchor-type="as-char" svg:y="-0.681cm" svg:width="12.393cm" svg:height="1.064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/>
      <text:p text:style-name="P2"/>
      <text:p text:style-name="P2"><draw:frame draw:style-name="fr1" draw:name="Object10" text:anchor-type="as-char" svg:y="-0.439cm" svg:width="1.325cm" svg:height="0.59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1" draw:name="Object11" text:anchor-type="as-char" svg:y="-0.439cm" svg:width="3.976cm" svg:height="0.59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1" draw:name="Object12" text:anchor-type="as-char" svg:y="-0.439cm" svg:width="5.666cm" svg:height="0.59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8:04:54.759617963</meta:creation-date>
    <meta:generator>LibreOffice/26.2.3.2$Linux_X86_64 LibreOffice_project/d4d5ed47b6084125f28d269a5650105d54dde034</meta:generator>
    <dc:date>2026-06-17T22:45:36.711210889</dc:date>
    <meta:editing-duration>PT1H15M16S</meta:editing-duration>
    <meta:editing-cycles>4</meta:editing-cycles>
    <meta:document-statistic meta:table-count="0" meta:image-count="0" meta:object-count="18" meta:page-count="1" meta:paragraph-count="18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style mathvariant="bold">
          <msub>
            <mi>u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>
          <mi>A</mi>
          <mi>s</mi>
        </msub>
      </mstyle>
      <mstyle mathvariant="bold">
        <msubsup>
          <mi>u</mi>
          <mn>1</mn>
          <mi>,</mi>
        </msubsup>
      </mstyle>
    </mrow>
    <annotation encoding="StarMath 5.0">bold u sub 1 = bold A sub 1 bold A sub s bold u^, sub 1
</annotation>
  </semantics>
</math>
</file>

<file path=Object 10/content.xml><?xml version="1.0" encoding="utf-8"?>
<math xmlns="http://www.w3.org/1998/Math/MathML" display="block">
  <semantics>
    <mrow>
      <mrow>
        <mi>d</mi>
        <mo stretchy="false">=</mo>
        <mstyle mathvariant="bold">
          <msubsup>
            <mi>a</mi>
            <mn>1</mn>
            <mi>T</mi>
          </msubsup>
        </mstyle>
      </mrow>
      <mstyle mathvariant="bold">
        <mi>d</mi>
      </mstyle>
    </mrow>
    <annotation encoding="StarMath 5.0">d = bold a^T sub 1 bold d</annotation>
  </semantics>
</math>
</file>

<file path=Object 11/content.xml><?xml version="1.0" encoding="utf-8"?>
<math xmlns="http://www.w3.org/1998/Math/MathML" display="block">
  <semantics>
    <mrow>
      <mrow>
        <mstyle mathvariant="bold">
          <mi>d</mi>
        </mstyle>
        <mo stretchy="false">=</mo>
        <mrow>
          <mstyle mathvariant="bold">
            <msub>
              <mi>r</mi>
              <mn>2</mn>
            </msub>
          </mstyle>
          <mo stretchy="false">+</mo>
          <mstyle mathvariant="bold">
            <msub>
              <mi>A</mi>
              <mn>2</mn>
            </msub>
          </mstyle>
        </mrow>
      </mrow>
      <mrow>
        <mstyle mathvariant="bold">
          <msubsup>
            <mi>s</mi>
            <mn>2</mn>
            <mi>,</mi>
          </msubsup>
        </mstyle>
        <mo stretchy="false">−</mo>
        <mstyle mathvariant="bold">
          <msub>
            <mi>r</mi>
            <mn>1</mn>
          </msub>
        </mstyle>
        <mo stretchy="false">−</mo>
        <mstyle mathvariant="bold">
          <msub>
            <mi>A</mi>
            <mn>1</mn>
          </msub>
        </mstyle>
      </mrow>
      <mstyle mathvariant="bold">
        <msubsup>
          <mi>s</mi>
          <mn>1</mn>
          <mi>,</mi>
        </msubsup>
      </mstyle>
    </mrow>
    <annotation encoding="StarMath 5.0">bold d = bold r sub 2 + bold A sub 2 bold s^, sub 2- bold r sub 1 - bold A sub 1 bold s^, sub 1</annotation>
  </semantics>
</math>
</file>

<file path=Object 12/content.xml><?xml version="1.0" encoding="utf-8"?>
<math xmlns="http://www.w3.org/1998/Math/MathML" display="block">
  <semantics>
    <mrow>
      <mrow>
        <mi>d</mi>
        <mo stretchy="false">=</mo>
        <msup>
          <mrow>
            <mo fence="true" form="prefix" stretchy="false">(</mo>
            <mrow>
              <mrow>
                <mstyle mathvariant="bold">
                  <msub>
                    <mi>A</mi>
                    <mn>1</mn>
                  </msub>
                </mstyle>
                <mstyle mathvariant="bold">
                  <msubsup>
                    <mi>a</mi>
                    <mn>1</mn>
                    <mi>,</mi>
                  </msubsup>
                </mstyle>
              </mrow>
            </mrow>
            <mo fence="true" form="postfix" stretchy="false">)</mo>
          </mrow>
          <mi>T</mi>
        </msup>
      </mrow>
      <mrow>
        <mo fence="true" form="prefix" stretchy="false">(</mo>
        <mrow>
          <mrow>
            <mrow>
              <mstyle mathvariant="bold">
                <msub>
                  <mi>r</mi>
                  <mn>2</mn>
                </msub>
              </mstyle>
              <mo stretchy="false">+</mo>
              <mstyle mathvariant="bold">
                <msub>
                  <mi>A</mi>
                  <mn>2</mn>
                </msub>
              </mstyle>
            </mrow>
            <mrow>
              <mstyle mathvariant="bold">
                <msubsup>
                  <mi>s</mi>
                  <mn>2</mn>
                  <mi>,</mi>
                </msubsup>
              </mstyle>
              <mo stretchy="false">−</mo>
              <mstyle mathvariant="bold">
                <msub>
                  <mi>r</mi>
                  <mn>1</mn>
                </msub>
              </mstyle>
              <mo stretchy="false">−</mo>
              <mstyle mathvariant="bold">
                <msub>
                  <mi>A</mi>
                  <mn>1</mn>
                </msub>
              </mstyle>
            </mrow>
            <mstyle mathvariant="bold">
              <msubsup>
                <mi>s</mi>
                <mn>1</mn>
                <mi>,</mi>
              </msubsup>
            </mstyle>
          </mrow>
        </mrow>
        <mo fence="true" form="postfix" stretchy="false">)</mo>
      </mrow>
    </mrow>
    <annotation encoding="StarMath 5.0">d = (bold A sub 1 bold a^, sub 1)^T(bold r sub 2 + bold A sub 2 bold s^, sub 2 
-bold r sub 1 - bold A sub 1 bold s^, sub 1 )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>
          <mi>A</mi>
          <mi>s</mi>
        </msub>
      </mstyle>
      <mrow>
        <mstyle mathvariant="bold">
          <msubsup>
            <mi>u</mi>
            <mn>1</mn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}={ddot bold A} sub 1 bold A sub s bold u^, sub 1 
+
bold A sub 1 {ddot bold A}sub s bold u^, sub 1
+
2 {dot bold A}sub 1 {dot bold A}sub s bold u^, sub 1</annotation>
  </semantics>
</math>
</file>

<file path=Object 14/content.xml><?xml version="1.0" encoding="utf-8"?>
<math xmlns="http://www.w3.org/1998/Math/MathML" display="block">
  <semantics>
    <mrow>
      <mrow>
        <mstyle mathvariant="bold">
          <msubsup>
            <mi>u</mi>
            <mi>s</mi>
            <mi>,</mi>
          </msubsup>
        </mstyle>
        <mo stretchy="false">=</mo>
        <mstyle mathvariant="bold">
          <msub>
            <mi>A</mi>
            <mi>s</mi>
          </msub>
        </mstyle>
      </mrow>
      <mstyle mathvariant="bold">
        <msubsup>
          <mi>u</mi>
          <mn>1</mn>
          <mi>,</mi>
        </msubsup>
      </mstyle>
    </mrow>
    <annotation encoding="StarMath 5.0">bold u^, sub s = bold A sub s bold u^, sub 1</annotation>
  </semantics>
</math>
</file>

<file path=Object 15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row>
        <mstyle mathvariant="bold">
          <msubsup>
            <mi>u</mi>
            <mi>s</mi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ddot bold u} sub 1={ddot bold A} sub 1 bold u^, sub s 
+
bold A sub 1 {ddot bold A}sub s bold u^, sub 1
+
2 {dot bold A}sub 1 {dot bold A}sub s bold u^, sub 1</annotation>
  </semantics>
</math>
</file>

<file path=Object 16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˙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over accent="true">
              <mi>d</mi>
              <mo stretchy="false">˙</mo>
            </mover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i>,</mi>
            <mfrac>
              <mi>β</mi>
              <mn>2</mn>
            </mfrac>
            <mover accent="true">
              <mi>d</mi>
              <mo stretchy="false">˙</mo>
            </mover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ot bold p} sub s = 
langle 
	-{%beta over 2} dot d sin(%beta over 2 d), 
	{%beta over 2} dot d cos(%beta over 2 d) bold a^, sub 1
rangle </annotation>
  </semantics>
</math>
</file>

<file path=Object 17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¨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over accent="true">
              <mi>d</mi>
              <mo stretchy="false">¨</mo>
            </mover>
            <mi>sin</mi>
            <mrow>
              <mrow>
                <mo fence="true" form="prefix" stretchy="false">(</mo>
                <mrow>
                  <mrow>
                    <mfrac>
                      <mi>β</mi>
                      <mn>2</mn>
                    </mfrac>
                    <mi>d</mi>
                  </mrow>
                </mrow>
                <mo fence="true" form="postfix" stretchy="false">)</mo>
              </mrow>
              <mo stretchy="false">−</mo>
              <mfrac>
                <msup>
                  <mi>β</mi>
                  <mn>2</mn>
                </msup>
                <mn>4</mn>
              </mfrac>
            </mrow>
            <msup>
              <mover accent="true">
                <mi>d</mi>
                <mo stretchy="false">˙</mo>
              </mover>
              <mn>2</mn>
            </msup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frac>
                    <mi>β</mi>
                    <mn>2</mn>
                  </mfrac>
                  <mover accent="true">
                    <mi>d</mi>
                    <mo stretchy="false">¨</mo>
                  </mover>
                  <mi>cos</mi>
                  <mrow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  <mo stretchy="false">−</mo>
                    <mfrac>
                      <msup>
                        <mi>β</mi>
                        <mn>2</mn>
                      </msup>
                      <mn>4</mn>
                    </mfrac>
                  </mrow>
                  <msup>
                    <mover accent="true">
                      <mi>d</mi>
                      <mo stretchy="false">˙</mo>
                    </mover>
                    <mn>2</mn>
                  </msup>
                  <mi>sin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dot bold p} sub s = 
langle 
	-{%beta over 2} ddot d sin(%beta over 2 d) -{%beta^2 over 4} {dot d}^2 cos(%beta over 2 d), 
	({%beta over 2} ddot d cos(%beta over 2 d) -{%beta^2 over 4} {dot d}^2 sin(%beta over 2 d)) bold a^, sub 1
rangle </annotation>
  </semantics>
</math>
</file>

<file path=Object 18/content.xml><?xml version="1.0" encoding="utf-8"?>
<math xmlns="http://www.w3.org/1998/Math/MathML" display="block">
  <semantics>
    <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=</mo>
        <mn>2</mn>
      </mrow>
      <msub>
        <mover accent="true">
          <mstyle mathvariant="bold">
            <mi>G</mi>
          </mstyle>
          <mo stretchy="false">˙</mo>
        </mover>
        <mi>s</mi>
      </msub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sub>
        <mover accent="true">
          <mstyle mathvariant="bold">
            <mi>p</mi>
          </mstyle>
          <mo stretchy="false">¨</mo>
        </mover>
        <mi>s</mi>
      </msub>
    </mrow>
    <annotation encoding="StarMath 5.0">{ddot bold A}sub s bold u^, sub 1
=
2 {dot bold G}sub s {dot bold L}^T sub s bold u^, sub 1 
+
2 bold G sub s overline{bold u^,sub 1} {ddot bold p} sub s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u</mi>
            <mn>2</mn>
          </msub>
        </mstyle>
        <mo stretchy="false">=</mo>
        <mstyle mathvariant="bold">
          <msub>
            <mi>A</mi>
            <mn>2</mn>
          </msub>
        </mstyle>
      </mrow>
      <mstyle mathvariant="bold">
        <msubsup>
          <mi>u</mi>
          <mn>2</mn>
          <mi>,</mi>
        </msubsup>
      </mstyle>
    </mrow>
    <annotation encoding="StarMath 5.0">bold u sub 2 = bold A sub 2 bold u^, sub 2</annotation>
  </semantics>
</math>
</file>

<file path=Object 3/content.xml><?xml version="1.0" encoding="utf-8"?>
<math xmlns="http://www.w3.org/1998/Math/MathML" display="block">
  <semantics>
    <mrow>
      <mrow>
        <mi>ϕ</mi>
        <mo stretchy="false">=</mo>
        <mstyle mathvariant="bold">
          <msubsup>
            <mi>u</mi>
            <mn>1</mn>
            <mi>T</mi>
          </msubsup>
        </mstyle>
      </mrow>
      <mrow>
        <mstyle mathvariant="bold">
          <msub>
            <mi>u</mi>
            <mn>2</mn>
          </msub>
        </mstyle>
        <mo stretchy="false">=</mo>
        <mn>0</mn>
      </mrow>
    </mrow>
    <annotation encoding="StarMath 5.0">%phi = bold u^T sub 1 bold u sub 2 = 0</annotation>
  </semantics>
</math>
</file>

<file path=Object 4/content.xml><?xml version="1.0" encoding="utf-8"?>
<math xmlns="http://www.w3.org/1998/Math/MathML" display="block">
  <semantics>
    <mrow>
      <mrow>
        <mfrac>
          <mrow>
            <mi>d</mi>
            <mi>ϕ</mi>
          </mrow>
          <mi mathvariant="italic">dt</mi>
        </mfrac>
        <mo stretchy="false">=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˙</mo>
          </mover>
          <mn>2</mn>
        </msub>
        <mo stretchy="false">+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u</mi>
          </mstyle>
          <mo stretchy="false">˙</mo>
        </mover>
        <mn>1</mn>
      </msub>
    </mrow>
    <annotation encoding="StarMath 5.0">{d %phi}over{dt}
=
bold u^T sub 1 {dot bold u} sub 2 + bold u^T sub 2 {dot bold u} sub 1</annotation>
  </semantics>
</math>
</file>

<file path=Object 5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˙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ot bold u} sub 1 = ({dot bold A} sub 1 bold A sub s + bold A sub 1 {dot bold A}sub s) bold u^, sub 1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¨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row>
                <msub>
                  <mover accent="true">
                    <mstyle mathvariant="bold">
                      <mi>A</mi>
                    </mstyle>
                    <mo stretchy="false">¨</mo>
                  </mover>
                  <mi>s</mi>
                </msub>
                <mo stretchy="false">+</mo>
                <mn>2</mn>
              </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dot bold u}sub 1 =
({ddot bold A}sub 1 bold A sub s + bold A sub 1 {ddot bold A}sub s 
+
2 {dot bold A}sub 1 {dot bold A}sub s)
bold u^, sub 1</annotation>
  </semantics>
</math>
</file>

<file path=Object 8/content.xml><?xml version="1.0" encoding="utf-8"?>
<math xmlns="http://www.w3.org/1998/Math/MathML" display="block">
  <semantics>
    <mrow>
      <mrow>
        <mstyle mathvariant="bold">
          <msub>
            <mi>A</mi>
            <mi>s</mi>
          </msub>
        </mstyle>
        <mo stretchy="false">=</mo>
        <mstyle mathvariant="bold">
          <msub>
            <mi>G</mi>
            <mi>s</mi>
          </msub>
        </mstyle>
      </mrow>
      <mstyle mathvariant="bold">
        <msubsup>
          <mi>L</mi>
          <mi>s</mi>
          <mi>T</mi>
        </msubsup>
      </mstyle>
    </mrow>
    <annotation encoding="StarMath 5.0">bold A sub s =
bold G sub s bold L^T sub s</annotation>
  </semantics>
</math>
</file>

<file path=Object 9/content.xml><?xml version="1.0" encoding="utf-8"?>
<math xmlns="http://www.w3.org/1998/Math/MathML" display="block">
  <semantics>
    <mrow>
      <mstyle mathvariant="bold">
        <msub>
          <mi>p</mi>
          <mi>s</mi>
        </msub>
      </mstyle>
      <mo stretchy="false">=</mo>
      <mrow>
        <mo fence="true" form="prefix" stretchy="false">⟨</mo>
        <mrow>
          <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i>,</mi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bold p sub s = langle cos(%beta over 2 d), sin(%beta over 2 d) bold a^, sub 1 rangle </annotation>
  </semantics>
</math>
</file>