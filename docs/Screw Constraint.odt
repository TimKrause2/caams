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4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4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4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ee36" officeooo:paragraph-rsid="000eee36"/>
    </style:style>
    <style:style style:name="P2" style:family="paragraph" style:parent-style-name="Standard">
      <style:text-properties officeooo:rsid="0015b398" officeooo:paragraph-rsid="0015b39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ject1" text:anchor-type="as-char" svg:y="-0.439cm" svg:width="2.12cm" svg:height="0.59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1" draw:name="Object2" text:anchor-type="as-char" svg:y="-0.439cm" svg:width="1.635cm" svg:height="0.594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draw:frame draw:style-name="fr1" draw:name="Object3" text:anchor-type="as-char" svg:y="-0.439cm" svg:width="2.043cm" svg:height="0.594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"><draw:frame draw:style-name="fr1" draw:name="Object4" text:anchor-type="as-char" svg:y="-0.621cm" svg:width="2.977cm" svg:height="1.00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><draw:frame draw:style-name="fr1" draw:name="Object5" text:anchor-type="as-char" svg:y="-0.681cm" svg:width="4.509cm" svg:height="1.124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><draw:frame draw:style-name="fr1" draw:name="Object6" text:anchor-type="as-char" svg:y="-0.439cm" svg:width="3.665cm" svg:height="0.594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><draw:frame draw:style-name="fr1" draw:name="Object7" text:anchor-type="as-char" svg:y="-0.439cm" svg:width="5.17cm" svg:height="0.594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"><draw:frame draw:style-name="fr1" draw:name="Object13" text:anchor-type="as-char" svg:y="-0.439cm" svg:width="5.339cm" svg:height="0.594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"><draw:frame draw:style-name="fr1" draw:name="Object14" text:anchor-type="as-char" svg:y="-0.439cm" svg:width="1.607cm" svg:height="0.594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"><draw:frame draw:style-name="fr1" draw:name="Object15" text:anchor-type="as-char" svg:y="-0.439cm" svg:width="5.212cm" svg:height="0.594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"><draw:frame draw:style-name="fr1" draw:name="Object8" text:anchor-type="as-char" svg:y="-0.439cm" svg:width="1.771cm" svg:height="0.594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"><draw:frame draw:style-name="fr1" draw:name="Object18" text:anchor-type="as-char" svg:y="-0.439cm" svg:width="4.724cm" svg:height="0.594cm" draw:z-index="15"><draw:object xlink:href="./Object 18" xlink:type="simple" xlink:show="embed" xlink:actuate="onLoad"/><draw:image xlink:href="./ObjectReplacements/Object 18" xlink:type="simple" xlink:show="embed" xlink:actuate="onLoad"/></draw:frame></text:p>
      <text:p text:style-name="P2"><draw:frame draw:style-name="fr1" draw:name="Object9" text:anchor-type="as-char" svg:y="-0.621cm" svg:width="4.775cm" svg:height="1.004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2"><draw:frame draw:style-name="fr1" draw:name="Object16" text:anchor-type="as-char" svg:y="-0.621cm" svg:width="6.451cm" svg:height="1.004c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2"><draw:frame draw:style-name="fr1" draw:name="Object17" text:anchor-type="as-char" svg:y="-0.681cm" svg:width="12.393cm" svg:height="1.064cm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2"><draw:frame draw:style-name="fr2" draw:name="Object21" text:anchor-type="as-char" svg:y="-2.531cm" svg:width="7.063cm" svg:height="4.794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2"/>
      <text:p text:style-name="P2"><draw:frame draw:style-name="fr1" draw:name="Object10" text:anchor-type="as-char" svg:y="-0.439cm" svg:width="1.325cm" svg:height="0.594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2"><draw:frame draw:style-name="fr2" draw:name="Object19" text:anchor-type="as-char" svg:y="-0.439cm" svg:width="2.469cm" svg:height="0.594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2"><draw:frame draw:style-name="fr2" draw:name="Object20" text:anchor-type="as-char" svg:y="-0.439cm" svg:width="3.478cm" svg:height="0.594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2"><draw:frame draw:style-name="fr1" draw:name="Object11" text:anchor-type="as-char" svg:y="-0.439cm" svg:width="3.976cm" svg:height="0.594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2"><draw:frame draw:style-name="fr1" draw:name="Object12" text:anchor-type="as-char" svg:y="-0.439cm" svg:width="5.666cm" svg:height="0.594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7T18:04:54.759617963</meta:creation-date>
    <meta:generator>LibreOffice/26.2.3.2$Linux_X86_64 LibreOffice_project/d4d5ed47b6084125f28d269a5650105d54dde034</meta:generator>
    <dc:date>2026-06-18T11:16:33.866363136</dc:date>
    <meta:editing-duration>PT1H58M3S</meta:editing-duration>
    <meta:editing-cycles>5</meta:editing-cycles>
    <meta:document-statistic meta:table-count="0" meta:image-count="0" meta:object-count="21" meta:page-count="1" meta:paragraph-count="21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row>
        <mstyle mathvariant="bold">
          <msub>
            <mi>u</mi>
            <mn>1</mn>
          </msub>
        </mstyle>
        <mo stretchy="false">=</mo>
        <mstyle mathvariant="bold">
          <msub>
            <mi>A</mi>
            <mn>1</mn>
          </msub>
        </mstyle>
      </mrow>
      <mstyle mathvariant="bold">
        <msub>
          <mi>A</mi>
          <mi>s</mi>
        </msub>
      </mstyle>
      <mstyle mathvariant="bold">
        <msubsup>
          <mi>u</mi>
          <mn>1</mn>
          <mi>,</mi>
        </msubsup>
      </mstyle>
    </mrow>
    <annotation encoding="StarMath 5.0">bold u sub 1 = bold A sub 1 bold A sub s bold u^, sub 1
</annotation>
  </semantics>
</math>
</file>

<file path=Object 10/content.xml><?xml version="1.0" encoding="utf-8"?>
<math xmlns="http://www.w3.org/1998/Math/MathML" display="block">
  <semantics>
    <mrow>
      <mrow>
        <mi>d</mi>
        <mo stretchy="false">=</mo>
        <mstyle mathvariant="bold">
          <msubsup>
            <mi>a</mi>
            <mn>1</mn>
            <mi>T</mi>
          </msubsup>
        </mstyle>
      </mrow>
      <mstyle mathvariant="bold">
        <mi>d</mi>
      </mstyle>
    </mrow>
    <annotation encoding="StarMath 5.0">d = bold a^T sub 1 bold d</annotation>
  </semantics>
</math>
</file>

<file path=Object 11/content.xml><?xml version="1.0" encoding="utf-8"?>
<math xmlns="http://www.w3.org/1998/Math/MathML" display="block">
  <semantics>
    <mrow>
      <mrow>
        <mstyle mathvariant="bold">
          <mi>d</mi>
        </mstyle>
        <mo stretchy="false">=</mo>
        <mrow>
          <mstyle mathvariant="bold">
            <msub>
              <mi>r</mi>
              <mn>2</mn>
            </msub>
          </mstyle>
          <mo stretchy="false">+</mo>
          <mstyle mathvariant="bold">
            <msub>
              <mi>A</mi>
              <mn>2</mn>
            </msub>
          </mstyle>
        </mrow>
      </mrow>
      <mrow>
        <mstyle mathvariant="bold">
          <msubsup>
            <mi>s</mi>
            <mn>2</mn>
            <mi>,</mi>
          </msubsup>
        </mstyle>
        <mo stretchy="false">−</mo>
        <mstyle mathvariant="bold">
          <msub>
            <mi>r</mi>
            <mn>1</mn>
          </msub>
        </mstyle>
        <mo stretchy="false">−</mo>
        <mstyle mathvariant="bold">
          <msub>
            <mi>A</mi>
            <mn>1</mn>
          </msub>
        </mstyle>
      </mrow>
      <mstyle mathvariant="bold">
        <msubsup>
          <mi>s</mi>
          <mn>1</mn>
          <mi>,</mi>
        </msubsup>
      </mstyle>
    </mrow>
    <annotation encoding="StarMath 5.0">bold d = bold r sub 2 + bold A sub 2 bold s^, sub 2- bold r sub 1 - bold A sub 1 bold s^, sub 1</annotation>
  </semantics>
</math>
</file>

<file path=Object 12/content.xml><?xml version="1.0" encoding="utf-8"?>
<math xmlns="http://www.w3.org/1998/Math/MathML" display="block">
  <semantics>
    <mrow>
      <mrow>
        <mi>d</mi>
        <mo stretchy="false">=</mo>
        <msup>
          <mrow>
            <mo fence="true" form="prefix" stretchy="false">(</mo>
            <mrow>
              <mrow>
                <mstyle mathvariant="bold">
                  <msub>
                    <mi>A</mi>
                    <mn>1</mn>
                  </msub>
                </mstyle>
                <mstyle mathvariant="bold">
                  <msubsup>
                    <mi>a</mi>
                    <mn>1</mn>
                    <mi>,</mi>
                  </msubsup>
                </mstyle>
              </mrow>
            </mrow>
            <mo fence="true" form="postfix" stretchy="false">)</mo>
          </mrow>
          <mi>T</mi>
        </msup>
      </mrow>
      <mrow>
        <mo fence="true" form="prefix" stretchy="false">(</mo>
        <mrow>
          <mrow>
            <mrow>
              <mstyle mathvariant="bold">
                <msub>
                  <mi>r</mi>
                  <mn>2</mn>
                </msub>
              </mstyle>
              <mo stretchy="false">+</mo>
              <mstyle mathvariant="bold">
                <msub>
                  <mi>A</mi>
                  <mn>2</mn>
                </msub>
              </mstyle>
            </mrow>
            <mrow>
              <mstyle mathvariant="bold">
                <msubsup>
                  <mi>s</mi>
                  <mn>2</mn>
                  <mi>,</mi>
                </msubsup>
              </mstyle>
              <mo stretchy="false">−</mo>
              <mstyle mathvariant="bold">
                <msub>
                  <mi>r</mi>
                  <mn>1</mn>
                </msub>
              </mstyle>
              <mo stretchy="false">−</mo>
              <mstyle mathvariant="bold">
                <msub>
                  <mi>A</mi>
                  <mn>1</mn>
                </msub>
              </mstyle>
            </mrow>
            <mstyle mathvariant="bold">
              <msubsup>
                <mi>s</mi>
                <mn>1</mn>
                <mi>,</mi>
              </msubsup>
            </mstyle>
          </mrow>
        </mrow>
        <mo fence="true" form="postfix" stretchy="false">)</mo>
      </mrow>
    </mrow>
    <annotation encoding="StarMath 5.0">d = (bold A sub 1 bold a^, sub 1)^T(bold r sub 2 + bold A sub 2 bold s^, sub 2 
-bold r sub 1 - bold A sub 1 bold s^, sub 1 )</annotation>
  </semantics>
</math>
</file>

<file path=Object 13/content.xml><?xml version="1.0" encoding="utf-8"?>
<math xmlns="http://www.w3.org/1998/Math/MathML" display="block">
  <semantics>
    <mrow>
      <mrow>
        <mrow/>
        <mo stretchy="false">=</mo>
        <msub>
          <mover accent="true">
            <mstyle mathvariant="bold">
              <mi>A</mi>
            </mstyle>
            <mo stretchy="false">¨</mo>
          </mover>
          <mn>1</mn>
        </msub>
      </mrow>
      <mstyle mathvariant="bold">
        <msub>
          <mi>A</mi>
          <mi>s</mi>
        </msub>
      </mstyle>
      <mrow>
        <mstyle mathvariant="bold">
          <msubsup>
            <mi>u</mi>
            <mn>1</mn>
            <mi>,</mi>
          </msubsup>
        </mstyle>
        <mo stretchy="false">+</mo>
        <mstyle mathvariant="bold">
          <msub>
            <mi>A</mi>
            <mn>1</mn>
          </msub>
        </mstyle>
      </mrow>
      <msub>
        <mover accent="true">
          <mstyle mathvariant="bold">
            <mi>A</mi>
          </mstyle>
          <mo stretchy="false">¨</mo>
        </mover>
        <mi>s</mi>
      </msub>
      <mrow>
        <mstyle mathvariant="bold">
          <msubsup>
            <mi>u</mi>
            <mn>1</mn>
            <mi>,</mi>
          </msubsup>
        </mstyle>
        <mo stretchy="false">+</mo>
        <mn>2</mn>
      </mrow>
      <msub>
        <mover accent="true">
          <mstyle mathvariant="bold">
            <mi>A</mi>
          </mstyle>
          <mo stretchy="false">˙</mo>
        </mover>
        <mn>1</mn>
      </msub>
      <msub>
        <mover accent="true">
          <mstyle mathvariant="bold">
            <mi>A</mi>
          </mstyle>
          <mo stretchy="false">˙</mo>
        </mover>
        <mi>s</mi>
      </msub>
      <mstyle mathvariant="bold">
        <msubsup>
          <mi>u</mi>
          <mn>1</mn>
          <mi>,</mi>
        </msubsup>
      </mstyle>
    </mrow>
    <annotation encoding="StarMath 5.0">{}={ddot bold A} sub 1 bold A sub s bold u^, sub 1 
+
bold A sub 1 {ddot bold A}sub s bold u^, sub 1
+
2 {dot bold A}sub 1 {dot bold A}sub s bold u^, sub 1</annotation>
  </semantics>
</math>
</file>

<file path=Object 14/content.xml><?xml version="1.0" encoding="utf-8"?>
<math xmlns="http://www.w3.org/1998/Math/MathML" display="block">
  <semantics>
    <mrow>
      <mrow>
        <mstyle mathvariant="bold">
          <msubsup>
            <mi>u</mi>
            <mi>s</mi>
            <mi>,</mi>
          </msubsup>
        </mstyle>
        <mo stretchy="false">=</mo>
        <mstyle mathvariant="bold">
          <msub>
            <mi>A</mi>
            <mi>s</mi>
          </msub>
        </mstyle>
      </mrow>
      <mstyle mathvariant="bold">
        <msubsup>
          <mi>u</mi>
          <mn>1</mn>
          <mi>,</mi>
        </msubsup>
      </mstyle>
    </mrow>
    <annotation encoding="StarMath 5.0">bold u^, sub s = bold A sub s bold u^, sub 1</annotation>
  </semantics>
</math>
</file>

<file path=Object 15/content.xml><?xml version="1.0" encoding="utf-8"?>
<math xmlns="http://www.w3.org/1998/Math/MathML" display="block">
  <semantics>
    <mrow>
      <mrow>
        <msub>
          <mover accent="true">
            <mstyle mathvariant="bold">
              <mi>u</mi>
            </mstyle>
            <mo stretchy="false">¨</mo>
          </mover>
          <mn>1</mn>
        </msub>
        <mo stretchy="false">=</mo>
        <msub>
          <mover accent="true">
            <mstyle mathvariant="bold">
              <mi>A</mi>
            </mstyle>
            <mo stretchy="false">¨</mo>
          </mover>
          <mn>1</mn>
        </msub>
      </mrow>
      <mrow>
        <mstyle mathvariant="bold">
          <msubsup>
            <mi>u</mi>
            <mi>s</mi>
            <mi>,</mi>
          </msubsup>
        </mstyle>
        <mo stretchy="false">+</mo>
        <mstyle mathvariant="bold">
          <msub>
            <mi>A</mi>
            <mn>1</mn>
          </msub>
        </mstyle>
      </mrow>
      <msub>
        <mover accent="true">
          <mstyle mathvariant="bold">
            <mi>A</mi>
          </mstyle>
          <mo stretchy="false">¨</mo>
        </mover>
        <mi>s</mi>
      </msub>
      <mrow>
        <mstyle mathvariant="bold">
          <msubsup>
            <mi>u</mi>
            <mn>1</mn>
            <mi>,</mi>
          </msubsup>
        </mstyle>
        <mo stretchy="false">+</mo>
        <mn>2</mn>
      </mrow>
      <msub>
        <mover accent="true">
          <mstyle mathvariant="bold">
            <mi>A</mi>
          </mstyle>
          <mo stretchy="false">˙</mo>
        </mover>
        <mn>1</mn>
      </msub>
      <msub>
        <mover accent="true">
          <mstyle mathvariant="bold">
            <mi>A</mi>
          </mstyle>
          <mo stretchy="false">˙</mo>
        </mover>
        <mi>s</mi>
      </msub>
      <mstyle mathvariant="bold">
        <msubsup>
          <mi>u</mi>
          <mn>1</mn>
          <mi>,</mi>
        </msubsup>
      </mstyle>
    </mrow>
    <annotation encoding="StarMath 5.0">{ddot bold u} sub 1={ddot bold A} sub 1 bold u^, sub s 
+
bold A sub 1 {ddot bold A}sub s bold u^, sub 1
+
2 {dot bold A}sub 1 {dot bold A}sub s bold u^, sub 1</annotation>
  </semantics>
</math>
</file>

<file path=Object 16/content.xml><?xml version="1.0" encoding="utf-8"?>
<math xmlns="http://www.w3.org/1998/Math/MathML" display="block">
  <semantics>
    <mrow>
      <msub>
        <mover accent="true">
          <mstyle mathvariant="bold">
            <mi>p</mi>
          </mstyle>
          <mo stretchy="false">˙</mo>
        </mover>
        <mi>s</mi>
      </msub>
      <mo stretchy="false">=</mo>
      <mrow>
        <mo fence="true" form="prefix" stretchy="false">⟨</mo>
        <mrow>
          <mrow>
            <mrow>
              <mo stretchy="false">−</mo>
              <mfrac>
                <mi>β</mi>
                <mn>2</mn>
              </mfrac>
            </mrow>
            <mi>sin</mi>
            <mrow>
              <mo fence="true" form="prefix" stretchy="false">(</mo>
              <mrow>
                <mrow>
                  <mfrac>
                    <mi>β</mi>
                    <mn>2</mn>
                  </mfrac>
                  <mi>d</mi>
                </mrow>
              </mrow>
              <mo fence="true" form="postfix" stretchy="false">)</mo>
            </mrow>
            <mover accent="true">
              <mi>d</mi>
              <mo stretchy="false">˙</mo>
            </mover>
            <mi>,</mi>
            <mfrac>
              <mi>β</mi>
              <mn>2</mn>
            </mfrac>
            <mi>cos</mi>
            <mrow>
              <mo fence="true" form="prefix" stretchy="false">(</mo>
              <mrow>
                <mrow>
                  <mfrac>
                    <mi>β</mi>
                    <mn>2</mn>
                  </mfrac>
                  <mi>d</mi>
                </mrow>
              </mrow>
              <mo fence="true" form="postfix" stretchy="false">)</mo>
            </mrow>
            <mover accent="true">
              <mi>d</mi>
              <mo stretchy="false">˙</mo>
            </mover>
            <mstyle mathvariant="bold">
              <msubsup>
                <mi>a</mi>
                <mn>1</mn>
                <mi>,</mi>
              </msubsup>
            </mstyle>
          </mrow>
        </mrow>
        <mo fence="true" form="postfix" stretchy="false">⟩</mo>
      </mrow>
    </mrow>
    <annotation encoding="StarMath 5.0">{dot bold p} sub s = 
langle 
	-{%beta over 2} sin(%beta over 2 d) dot d, 
	{%beta over 2} cos(%beta over 2 d) dot d bold a^, sub 1
rangle </annotation>
  </semantics>
</math>
</file>

<file path=Object 17/content.xml><?xml version="1.0" encoding="utf-8"?>
<math xmlns="http://www.w3.org/1998/Math/MathML" display="block">
  <semantics>
    <mrow>
      <msub>
        <mover accent="true">
          <mstyle mathvariant="bold">
            <mi>p</mi>
          </mstyle>
          <mo stretchy="false">¨</mo>
        </mover>
        <mi>s</mi>
      </msub>
      <mo stretchy="false">=</mo>
      <mrow>
        <mo fence="true" form="prefix" stretchy="false">⟨</mo>
        <mrow>
          <mrow>
            <mrow>
              <mo stretchy="false">−</mo>
              <mfrac>
                <mi>β</mi>
                <mn>2</mn>
              </mfrac>
            </mrow>
            <mi>sin</mi>
            <mrow>
              <mo fence="true" form="prefix" stretchy="false">(</mo>
              <mrow>
                <mrow>
                  <mfrac>
                    <mi>β</mi>
                    <mn>2</mn>
                  </mfrac>
                  <mi>d</mi>
                </mrow>
              </mrow>
              <mo fence="true" form="postfix" stretchy="false">)</mo>
            </mrow>
            <mrow>
              <mover accent="true">
                <mi>d</mi>
                <mo stretchy="false">¨</mo>
              </mover>
              <mo stretchy="false">−</mo>
              <mfrac>
                <msup>
                  <mi>β</mi>
                  <mn>2</mn>
                </msup>
                <mn>4</mn>
              </mfrac>
            </mrow>
            <mi>cos</mi>
            <mrow>
              <mo fence="true" form="prefix" stretchy="false">(</mo>
              <mrow>
                <mrow>
                  <mfrac>
                    <mi>β</mi>
                    <mn>2</mn>
                  </mfrac>
                  <mi>d</mi>
                </mrow>
              </mrow>
              <mo fence="true" form="postfix" stretchy="false">)</mo>
            </mrow>
            <msup>
              <mover accent="true">
                <mi>d</mi>
                <mo stretchy="false">˙</mo>
              </mover>
              <mn>2</mn>
            </msup>
            <mi>,</mi>
            <mrow>
              <mo fence="true" form="prefix" stretchy="false">(</mo>
              <mrow>
                <mrow>
                  <mfrac>
                    <mi>β</mi>
                    <mn>2</mn>
                  </mfrac>
                  <mi>cos</mi>
                  <mrow>
                    <mo fence="true" form="prefix" stretchy="false">(</mo>
                    <mrow>
                      <mrow>
                        <mfrac>
                          <mi>β</mi>
                          <mn>2</mn>
                        </mfrac>
                        <mi>d</mi>
                      </mrow>
                    </mrow>
                    <mo fence="true" form="postfix" stretchy="false">)</mo>
                  </mrow>
                  <mrow>
                    <mover accent="true">
                      <mi>d</mi>
                      <mo stretchy="false">¨</mo>
                    </mover>
                    <mo stretchy="false">−</mo>
                    <mfrac>
                      <msup>
                        <mi>β</mi>
                        <mn>2</mn>
                      </msup>
                      <mn>4</mn>
                    </mfrac>
                  </mrow>
                  <mi>sin</mi>
                  <mrow>
                    <mo fence="true" form="prefix" stretchy="false">(</mo>
                    <mrow>
                      <mrow>
                        <mfrac>
                          <mi>β</mi>
                          <mn>2</mn>
                        </mfrac>
                        <mi>d</mi>
                      </mrow>
                    </mrow>
                    <mo fence="true" form="postfix" stretchy="false">)</mo>
                  </mrow>
                  <msup>
                    <mover accent="true">
                      <mi>d</mi>
                      <mo stretchy="false">˙</mo>
                    </mover>
                    <mn>2</mn>
                  </msup>
                </mrow>
              </mrow>
              <mo fence="true" form="postfix" stretchy="false">)</mo>
            </mrow>
            <mstyle mathvariant="bold">
              <msubsup>
                <mi>a</mi>
                <mn>1</mn>
                <mi>,</mi>
              </msubsup>
            </mstyle>
          </mrow>
        </mrow>
        <mo fence="true" form="postfix" stretchy="false">⟩</mo>
      </mrow>
    </mrow>
    <annotation encoding="StarMath 5.0">{ddot bold p} sub s = 
langle 
	-{%beta over 2} sin(%beta over 2 d) ddot d -{%beta^2 over 4} cos(%beta over 2 d) {dot d}^2, 
	({%beta over 2} cos(%beta over 2 d) ddot d -{%beta^2 over 4} sin(%beta over 2 d) {dot d}^2) bold a^, sub 1
rangle </annotation>
  </semantics>
</math>
</file>

<file path=Object 18/content.xml><?xml version="1.0" encoding="utf-8"?>
<math xmlns="http://www.w3.org/1998/Math/MathML" display="block">
  <semantics>
    <mrow>
      <msub>
        <mover accent="true">
          <mstyle mathvariant="bold">
            <mi>A</mi>
          </mstyle>
          <mo stretchy="false">¨</mo>
        </mover>
        <mi>s</mi>
      </msub>
      <mrow>
        <mstyle mathvariant="bold">
          <msubsup>
            <mi>u</mi>
            <mn>1</mn>
            <mi>,</mi>
          </msubsup>
        </mstyle>
        <mo stretchy="false">=</mo>
        <mn>2</mn>
      </mrow>
      <msub>
        <mover accent="true">
          <mstyle mathvariant="bold">
            <mi>G</mi>
          </mstyle>
          <mo stretchy="false">˙</mo>
        </mover>
        <mi>s</mi>
      </msub>
      <msubsup>
        <mover accent="true">
          <mstyle mathvariant="bold">
            <mi>L</mi>
          </mstyle>
          <mo stretchy="false">˙</mo>
        </mover>
        <mi>s</mi>
        <mi>T</mi>
      </msubsup>
      <mrow>
        <mstyle mathvariant="bold">
          <msubsup>
            <mi>u</mi>
            <mn>1</mn>
            <mi>,</mi>
          </msubsup>
        </mstyle>
        <mo stretchy="false">+</mo>
        <mn>2</mn>
      </mrow>
      <mstyle mathvariant="bold">
        <msub>
          <mi>G</mi>
          <mi>s</mi>
        </msub>
      </mstyle>
      <mover accent="true">
        <mstyle mathvariant="bold">
          <msubsup>
            <mi>u</mi>
            <mn>1</mn>
            <mi>,</mi>
          </msubsup>
        </mstyle>
        <mo>¯</mo>
      </mover>
      <msub>
        <mover accent="true">
          <mstyle mathvariant="bold">
            <mi>p</mi>
          </mstyle>
          <mo stretchy="false">¨</mo>
        </mover>
        <mi>s</mi>
      </msub>
    </mrow>
    <annotation encoding="StarMath 5.0">{ddot bold A}sub s bold u^, sub 1
=
2 {dot bold G}sub s {dot bold L}^T sub s bold u^, sub 1 
+
2 bold G sub s overline{bold u^,sub 1} {ddot bold p} sub s</annotation>
  </semantics>
</math>
</file>

<file path=Object 19/content.xml><?xml version="1.0" encoding="utf-8"?>
<math xmlns="http://www.w3.org/1998/Math/MathML" display="block">
  <semantics>
    <mrow>
      <mrow>
        <mover accent="true">
          <mi>d</mi>
          <mo stretchy="false">˙</mo>
        </mover>
        <mo stretchy="false">=</mo>
        <mstyle mathvariant="bold">
          <msubsup>
            <mi>a</mi>
            <mn>1</mn>
            <mi>T</mi>
          </msubsup>
        </mstyle>
      </mrow>
      <mrow>
        <mover accent="true">
          <mstyle mathvariant="bold">
            <mi>d</mi>
          </mstyle>
          <mo stretchy="false">˙</mo>
        </mover>
        <mo stretchy="false">+</mo>
        <mstyle mathvariant="bold">
          <msup>
            <mi>d</mi>
            <mi>T</mi>
          </msup>
        </mstyle>
      </mrow>
      <mover accent="true">
        <mstyle mathvariant="bold">
          <msub>
            <mi>a</mi>
            <mn>1</mn>
          </msub>
        </mstyle>
        <mo stretchy="false">˙</mo>
      </mover>
    </mrow>
    <annotation encoding="StarMath 5.0">dot d 
=
bold a^T sub 1 dot bold d
+
bold d^T dot bold a sub1</annotation>
  </semantics>
</math>
</file>

<file path=Object 2/content.xml><?xml version="1.0" encoding="utf-8"?>
<math xmlns="http://www.w3.org/1998/Math/MathML" display="block">
  <semantics>
    <mrow>
      <mrow>
        <mstyle mathvariant="bold">
          <msub>
            <mi>u</mi>
            <mn>2</mn>
          </msub>
        </mstyle>
        <mo stretchy="false">=</mo>
        <mstyle mathvariant="bold">
          <msub>
            <mi>A</mi>
            <mn>2</mn>
          </msub>
        </mstyle>
      </mrow>
      <mstyle mathvariant="bold">
        <msubsup>
          <mi>u</mi>
          <mn>2</mn>
          <mi>,</mi>
        </msubsup>
      </mstyle>
    </mrow>
    <annotation encoding="StarMath 5.0">bold u sub 2 = bold A sub 2 bold u^, sub 2</annotation>
  </semantics>
</math>
</file>

<file path=Object 20/content.xml><?xml version="1.0" encoding="utf-8"?>
<math xmlns="http://www.w3.org/1998/Math/MathML" display="block">
  <semantics>
    <mrow>
      <mrow>
        <mover accent="true">
          <mi>d</mi>
          <mo stretchy="false">¨</mo>
        </mover>
        <mo stretchy="false">=</mo>
        <mstyle mathvariant="bold">
          <msubsup>
            <mi>a</mi>
            <mn>1</mn>
            <mi>T</mi>
          </msubsup>
        </mstyle>
      </mrow>
      <mrow>
        <mover accent="true">
          <mstyle mathvariant="bold">
            <mi>d</mi>
          </mstyle>
          <mo stretchy="false">¨</mo>
        </mover>
        <mo stretchy="false">+</mo>
        <mstyle mathvariant="bold">
          <msup>
            <mi>d</mi>
            <mi>T</mi>
          </msup>
        </mstyle>
      </mrow>
      <mrow>
        <mover accent="true">
          <mstyle mathvariant="bold">
            <msub>
              <mi>a</mi>
              <mn>1</mn>
            </msub>
          </mstyle>
          <mo stretchy="false">¨</mo>
        </mover>
        <mo stretchy="false">+</mo>
        <msubsup>
          <mover accent="true">
            <mstyle mathvariant="bold">
              <mi>a</mi>
            </mstyle>
            <mo stretchy="false">˙</mo>
          </mover>
          <mn>1</mn>
          <mi>T</mi>
        </msubsup>
      </mrow>
      <mover accent="true">
        <mstyle mathvariant="bold">
          <mi>d</mi>
        </mstyle>
        <mo stretchy="false">˙</mo>
      </mover>
    </mrow>
    <annotation encoding="StarMath 5.0">ddot d
=
bold a^T sub 1 ddot bold d
+
bold d^T ddot bold a sub 1
+
{dot bold a}^T sub 1 dot bold d
</annotation>
  </semantics>
</math>
</file>

<file path=Object 21/content.xml><?xml version="1.0" encoding="utf-8"?>
<math xmlns="http://www.w3.org/1998/Math/MathML" display="block">
  <semantics>
    <mrow>
      <mrow>
        <mrow/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frac>
                        <mi>β</mi>
                        <mn>2</mn>
                      </mfrac>
                    </mrow>
                    <mi>sin</mi>
                    <mrow>
                      <mo fence="true" form="prefix" stretchy="false">(</mo>
                      <mrow>
                        <mrow>
                          <mfrac>
                            <mi>β</mi>
                            <mn>2</mn>
                          </mfrac>
                          <mi>d</mi>
                        </mrow>
                      </mrow>
                      <mo fence="true" form="postfix" stretchy="false">)</mo>
                    </mrow>
                  </mrow>
                </mtd>
                <mtd>
                  <mrow>
                    <mrow>
                      <mo stretchy="false">−</mo>
                      <mfrac>
                        <msup>
                          <mi>β</mi>
                          <mn>2</mn>
                        </msup>
                        <mn>4</mn>
                      </mfrac>
                    </mrow>
                    <mi>cos</mi>
                    <mrow>
                      <mo fence="true" form="prefix" stretchy="false">(</mo>
                      <mrow>
                        <mrow>
                          <mfrac>
                            <mi>β</mi>
                            <mn>2</mn>
                          </mfrac>
                          <mi>d</mi>
                        </mrow>
                      </mrow>
                      <mo fence="true" form="postfix" stretchy="false">)</mo>
                    </mrow>
                  </mrow>
                </mtd>
              </mtr>
              <mtr>
                <mtd>
                  <mrow>
                    <msubsup>
                      <mi>a</mi>
                      <mrow>
                        <mn>1</mn>
                        <mi>x</mi>
                      </mrow>
                      <mi>,</mi>
                    </msubsup>
                    <mfrac>
                      <mi>β</mi>
                      <mn>2</mn>
                    </mfrac>
                    <mi>cos</mi>
                    <mrow>
                      <mo fence="true" form="prefix" stretchy="false">(</mo>
                      <mrow>
                        <mrow>
                          <mfrac>
                            <mi>β</mi>
                            <mn>2</mn>
                          </mfrac>
                          <mi>d</mi>
                        </mrow>
                      </mrow>
                      <mo fence="true" form="postfix" stretchy="false">)</mo>
                    </mrow>
                  </mrow>
                </mtd>
                <mtd>
                  <mrow>
                    <mrow>
                      <mo stretchy="false">−</mo>
                      <msubsup>
                        <mi>a</mi>
                        <mrow>
                          <mn>1</mn>
                          <mi>x</mi>
                        </mrow>
                        <mi>,</mi>
                      </msubsup>
                    </mrow>
                    <mfrac>
                      <msup>
                        <mi>β</mi>
                        <mn>2</mn>
                      </msup>
                      <mn>4</mn>
                    </mfrac>
                    <mi>sin</mi>
                    <mrow>
                      <mo fence="true" form="prefix" stretchy="false">(</mo>
                      <mrow>
                        <mrow>
                          <mfrac>
                            <mi>β</mi>
                            <mn>2</mn>
                          </mfrac>
                          <mi>d</mi>
                        </mrow>
                      </mrow>
                      <mo fence="true" form="postfix" stretchy="false">)</mo>
                    </mrow>
                  </mrow>
                </mtd>
              </mtr>
              <mtr>
                <mtd>
                  <mrow>
                    <msubsup>
                      <mi>a</mi>
                      <mrow>
                        <mn>1</mn>
                        <mi>y</mi>
                      </mrow>
                      <mi>,</mi>
                    </msubsup>
                    <mfrac>
                      <mi>β</mi>
                      <mn>2</mn>
                    </mfrac>
                    <mi>cos</mi>
                    <mrow>
                      <mo fence="true" form="prefix" stretchy="false">(</mo>
                      <mrow>
                        <mrow>
                          <mfrac>
                            <mi>β</mi>
                            <mn>2</mn>
                          </mfrac>
                          <mi>d</mi>
                        </mrow>
                      </mrow>
                      <mo fence="true" form="postfix" stretchy="false">)</mo>
                    </mrow>
                  </mrow>
                </mtd>
                <mtd>
                  <mrow>
                    <mrow>
                      <mo stretchy="false">−</mo>
                      <msubsup>
                        <mi>a</mi>
                        <mrow>
                          <mn>1</mn>
                          <mi>y</mi>
                        </mrow>
                        <mi>,</mi>
                      </msubsup>
                    </mrow>
                    <mfrac>
                      <msup>
                        <mi>β</mi>
                        <mn>2</mn>
                      </msup>
                      <mn>4</mn>
                    </mfrac>
                    <mi>sin</mi>
                    <mrow>
                      <mo fence="true" form="prefix" stretchy="false">(</mo>
                      <mrow>
                        <mrow>
                          <mfrac>
                            <mi>β</mi>
                            <mn>2</mn>
                          </mfrac>
                          <mi>d</mi>
                        </mrow>
                      </mrow>
                      <mo fence="true" form="postfix" stretchy="false">)</mo>
                    </mrow>
                  </mrow>
                </mtd>
              </mtr>
              <mtr>
                <mtd>
                  <mrow>
                    <msubsup>
                      <mi>a</mi>
                      <mrow>
                        <mn>1</mn>
                        <mi>z</mi>
                      </mrow>
                      <mi>,</mi>
                    </msubsup>
                    <mfrac>
                      <mi>β</mi>
                      <mn>2</mn>
                    </mfrac>
                    <mi>cos</mi>
                    <mrow>
                      <mo fence="true" form="prefix" stretchy="false">(</mo>
                      <mrow>
                        <mrow>
                          <mfrac>
                            <mi>β</mi>
                            <mn>2</mn>
                          </mfrac>
                          <mi>d</mi>
                        </mrow>
                      </mrow>
                      <mo fence="true" form="postfix" stretchy="false">)</mo>
                    </mrow>
                  </mrow>
                </mtd>
                <mtd>
                  <mrow>
                    <mrow>
                      <mo stretchy="false">−</mo>
                      <msubsup>
                        <mi>a</mi>
                        <mrow>
                          <mn>1</mn>
                          <mi>z</mi>
                        </mrow>
                        <mi>,</mi>
                      </msubsup>
                    </mrow>
                    <mfrac>
                      <msup>
                        <mi>β</mi>
                        <mn>2</mn>
                      </msup>
                      <mn>4</mn>
                    </mfrac>
                    <mi>sin</mi>
                    <mrow>
                      <mo fence="true" form="prefix" stretchy="false">(</mo>
                      <mrow>
                        <mrow>
                          <mfrac>
                            <mi>β</mi>
                            <mn>2</mn>
                          </mfrac>
                          <mi>d</mi>
                        </mrow>
                      </mrow>
                      <mo fence="true" form="postfix" stretchy="false">)</mo>
                    </mrow>
                  </mrow>
                </mtd>
              </mtr>
            </mtable>
          </mrow>
          <mo fence="true" form="postfix" stretchy="true">]</mo>
        </mrow>
      </mrow>
      <mrow>
        <mo fence="true" form="prefix" stretchy="true">[</mo>
        <mrow>
          <mtable>
            <mtr>
              <mtd>
                <mover accent="true">
                  <mi>d</mi>
                  <mo stretchy="false">¨</mo>
                </mover>
              </mtd>
            </mtr>
            <mtr>
              <mtd>
                <mover accent="true">
                  <mi>d</mi>
                  <mo stretchy="false">˙</mo>
                </mover>
              </mtd>
            </mtr>
          </mtable>
        </mrow>
        <mo fence="true" form="postfix" stretchy="true">]</mo>
      </mrow>
    </mrow>
    <annotation encoding="StarMath 5.0">{}=
left [ matrix{
	-{%beta over 2}sin({%beta over 2}d) # -{%beta^2 over 4}cos({%beta over 2}d) ##
	 a^, sub 1x {%beta over 2}cos({%beta over 2}d) # -a^, sub 1x {%beta^2 over 4}sin({%beta over 2}d) ##
	 a^, sub 1y {%beta over 2}cos({%beta over 2}d) # -a^, sub 1y {%beta^2 over 4}sin({%beta over 2}d) ##
	 a^, sub 1z {%beta over 2}cos({%beta over 2}d) # -a^, sub 1z {%beta^2 over 4}sin({%beta over 2}d)
}  right ] 

left [ matrix{
	ddot d ##
	dot d} right ]</annotation>
  </semantics>
</math>
</file>

<file path=Object 3/content.xml><?xml version="1.0" encoding="utf-8"?>
<math xmlns="http://www.w3.org/1998/Math/MathML" display="block">
  <semantics>
    <mrow>
      <mrow>
        <mi>ϕ</mi>
        <mo stretchy="false">=</mo>
        <mstyle mathvariant="bold">
          <msubsup>
            <mi>u</mi>
            <mn>1</mn>
            <mi>T</mi>
          </msubsup>
        </mstyle>
      </mrow>
      <mrow>
        <mstyle mathvariant="bold">
          <msub>
            <mi>u</mi>
            <mn>2</mn>
          </msub>
        </mstyle>
        <mo stretchy="false">=</mo>
        <mn>0</mn>
      </mrow>
    </mrow>
    <annotation encoding="StarMath 5.0">%phi = bold u^T sub 1 bold u sub 2 = 0</annotation>
  </semantics>
</math>
</file>

<file path=Object 4/content.xml><?xml version="1.0" encoding="utf-8"?>
<math xmlns="http://www.w3.org/1998/Math/MathML" display="block">
  <semantics>
    <mrow>
      <mrow>
        <mfrac>
          <mrow>
            <mi>d</mi>
            <mi>ϕ</mi>
          </mrow>
          <mi mathvariant="italic">dt</mi>
        </mfrac>
        <mo stretchy="false">=</mo>
        <mstyle mathvariant="bold">
          <msubsup>
            <mi>u</mi>
            <mn>1</mn>
            <mi>T</mi>
          </msubsup>
        </mstyle>
      </mrow>
      <mrow>
        <msub>
          <mover accent="true">
            <mstyle mathvariant="bold">
              <mi>u</mi>
            </mstyle>
            <mo stretchy="false">˙</mo>
          </mover>
          <mn>2</mn>
        </msub>
        <mo stretchy="false">+</mo>
        <mstyle mathvariant="bold">
          <msubsup>
            <mi>u</mi>
            <mn>2</mn>
            <mi>T</mi>
          </msubsup>
        </mstyle>
      </mrow>
      <msub>
        <mover accent="true">
          <mstyle mathvariant="bold">
            <mi>u</mi>
          </mstyle>
          <mo stretchy="false">˙</mo>
        </mover>
        <mn>1</mn>
      </msub>
    </mrow>
    <annotation encoding="StarMath 5.0">{d %phi}over{dt}
=
bold u^T sub 1 {dot bold u} sub 2 + bold u^T sub 2 {dot bold u} sub 1</annotation>
  </semantics>
</math>
</file>

<file path=Object 5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ϕ</mi>
          </mrow>
          <msup>
            <mi mathvariant="italic">dt</mi>
            <mn>2</mn>
          </msup>
        </mfrac>
        <mo stretchy="false">=</mo>
        <mstyle mathvariant="bold">
          <msubsup>
            <mi>u</mi>
            <mn>2</mn>
            <mi>T</mi>
          </msubsup>
        </mstyle>
      </mrow>
      <mrow>
        <msub>
          <mover accent="true">
            <mstyle mathvariant="bold">
              <mi>u</mi>
            </mstyle>
            <mo stretchy="false">¨</mo>
          </mover>
          <mn>1</mn>
        </msub>
        <mo stretchy="false">+</mo>
        <mstyle mathvariant="bold">
          <msubsup>
            <mi>u</mi>
            <mn>1</mn>
            <mi>T</mi>
          </msubsup>
        </mstyle>
      </mrow>
      <mrow>
        <msub>
          <mover accent="true">
            <mstyle mathvariant="bold">
              <mi>u</mi>
            </mstyle>
            <mo stretchy="false">¨</mo>
          </mover>
          <mn>2</mn>
        </msub>
        <mo stretchy="false">+</mo>
        <mn>2</mn>
      </mrow>
      <msubsup>
        <mover accent="true">
          <mstyle mathvariant="bold">
            <mi>u</mi>
          </mstyle>
          <mo stretchy="false">˙</mo>
        </mover>
        <mn>1</mn>
        <mi>T</mi>
      </msubsup>
      <msub>
        <mover accent="true">
          <mstyle mathvariant="bold">
            <mi>u</mi>
          </mstyle>
          <mo stretchy="false">˙</mo>
        </mover>
        <mn>2</mn>
      </msub>
    </mrow>
    <annotation encoding="StarMath 5.0">{d^2 %phi}over{dt^2}
=
bold u^T sub 2 {ddot bold u} sub 1 + bold u^T sub 1 {ddot bold u} sub 2
+
2 {dot bold u}^T sub 1 {dot bold u} sub 2</annotation>
  </semantics>
</math>
</file>

<file path=Object 6/content.xml><?xml version="1.0" encoding="utf-8"?>
<math xmlns="http://www.w3.org/1998/Math/MathML" display="block">
  <semantics>
    <mrow>
      <mrow>
        <msub>
          <mover accent="true">
            <mstyle mathvariant="bold">
              <mi>u</mi>
            </mstyle>
            <mo stretchy="false">˙</mo>
          </mover>
          <mn>1</mn>
        </msub>
        <mo stretchy="false">=</mo>
        <mrow>
          <mo fence="true" form="prefix" stretchy="false">(</mo>
          <mrow>
            <mrow>
              <msub>
                <mover accent="true">
                  <mstyle mathvariant="bold">
                    <mi>A</mi>
                  </mstyle>
                  <mo stretchy="false">˙</mo>
                </mover>
                <mn>1</mn>
              </msub>
              <mrow>
                <mstyle mathvariant="bold">
                  <msub>
                    <mi>A</mi>
                    <mi>s</mi>
                  </msub>
                </mstyle>
                <mo stretchy="false">+</mo>
                <mstyle mathvariant="bold">
                  <msub>
                    <mi>A</mi>
                    <mn>1</mn>
                  </msub>
                </mstyle>
              </mrow>
              <msub>
                <mover accent="true">
                  <mstyle mathvariant="bold">
                    <mi>A</mi>
                  </mstyle>
                  <mo stretchy="false">˙</mo>
                </mover>
                <mi>s</mi>
              </msub>
            </mrow>
          </mrow>
          <mo fence="true" form="postfix" stretchy="false">)</mo>
        </mrow>
      </mrow>
      <mstyle mathvariant="bold">
        <msubsup>
          <mi>u</mi>
          <mn>1</mn>
          <mi>,</mi>
        </msubsup>
      </mstyle>
    </mrow>
    <annotation encoding="StarMath 5.0">{dot bold u} sub 1 = ({dot bold A} sub 1 bold A sub s + bold A sub 1 {dot bold A}sub s) bold u^, sub 1</annotation>
  </semantics>
</math>
</file>

<file path=Object 7/content.xml><?xml version="1.0" encoding="utf-8"?>
<math xmlns="http://www.w3.org/1998/Math/MathML" display="block">
  <semantics>
    <mrow>
      <mrow>
        <msub>
          <mover accent="true">
            <mstyle mathvariant="bold">
              <mi>u</mi>
            </mstyle>
            <mo stretchy="false">¨</mo>
          </mover>
          <mn>1</mn>
        </msub>
        <mo stretchy="false">=</mo>
        <mrow>
          <mo fence="true" form="prefix" stretchy="false">(</mo>
          <mrow>
            <mrow>
              <msub>
                <mover accent="true">
                  <mstyle mathvariant="bold">
                    <mi>A</mi>
                  </mstyle>
                  <mo stretchy="false">¨</mo>
                </mover>
                <mn>1</mn>
              </msub>
              <mrow>
                <mstyle mathvariant="bold">
                  <msub>
                    <mi>A</mi>
                    <mi>s</mi>
                  </msub>
                </mstyle>
                <mo stretchy="false">+</mo>
                <mstyle mathvariant="bold">
                  <msub>
                    <mi>A</mi>
                    <mn>1</mn>
                  </msub>
                </mstyle>
              </mrow>
              <mrow>
                <msub>
                  <mover accent="true">
                    <mstyle mathvariant="bold">
                      <mi>A</mi>
                    </mstyle>
                    <mo stretchy="false">¨</mo>
                  </mover>
                  <mi>s</mi>
                </msub>
                <mo stretchy="false">+</mo>
                <mn>2</mn>
              </mrow>
              <msub>
                <mover accent="true">
                  <mstyle mathvariant="bold">
                    <mi>A</mi>
                  </mstyle>
                  <mo stretchy="false">˙</mo>
                </mover>
                <mn>1</mn>
              </msub>
              <msub>
                <mover accent="true">
                  <mstyle mathvariant="bold">
                    <mi>A</mi>
                  </mstyle>
                  <mo stretchy="false">˙</mo>
                </mover>
                <mi>s</mi>
              </msub>
            </mrow>
          </mrow>
          <mo fence="true" form="postfix" stretchy="false">)</mo>
        </mrow>
      </mrow>
      <mstyle mathvariant="bold">
        <msubsup>
          <mi>u</mi>
          <mn>1</mn>
          <mi>,</mi>
        </msubsup>
      </mstyle>
    </mrow>
    <annotation encoding="StarMath 5.0">{ddot bold u}sub 1 =
({ddot bold A}sub 1 bold A sub s + bold A sub 1 {ddot bold A}sub s 
+
2 {dot bold A}sub 1 {dot bold A}sub s)
bold u^, sub 1</annotation>
  </semantics>
</math>
</file>

<file path=Object 8/content.xml><?xml version="1.0" encoding="utf-8"?>
<math xmlns="http://www.w3.org/1998/Math/MathML" display="block">
  <semantics>
    <mrow>
      <mrow>
        <mstyle mathvariant="bold">
          <msub>
            <mi>A</mi>
            <mi>s</mi>
          </msub>
        </mstyle>
        <mo stretchy="false">=</mo>
        <mstyle mathvariant="bold">
          <msub>
            <mi>G</mi>
            <mi>s</mi>
          </msub>
        </mstyle>
      </mrow>
      <mstyle mathvariant="bold">
        <msubsup>
          <mi>L</mi>
          <mi>s</mi>
          <mi>T</mi>
        </msubsup>
      </mstyle>
    </mrow>
    <annotation encoding="StarMath 5.0">bold A sub s =
bold G sub s bold L^T sub s</annotation>
  </semantics>
</math>
</file>

<file path=Object 9/content.xml><?xml version="1.0" encoding="utf-8"?>
<math xmlns="http://www.w3.org/1998/Math/MathML" display="block">
  <semantics>
    <mrow>
      <mstyle mathvariant="bold">
        <msub>
          <mi>p</mi>
          <mi>s</mi>
        </msub>
      </mstyle>
      <mo stretchy="false">=</mo>
      <mrow>
        <mo fence="true" form="prefix" stretchy="false">⟨</mo>
        <mrow>
          <mrow>
            <mi>cos</mi>
            <mrow>
              <mo fence="true" form="prefix" stretchy="false">(</mo>
              <mrow>
                <mrow>
                  <mfrac>
                    <mi>β</mi>
                    <mn>2</mn>
                  </mfrac>
                  <mi>d</mi>
                </mrow>
              </mrow>
              <mo fence="true" form="postfix" stretchy="false">)</mo>
            </mrow>
            <mi>,</mi>
            <mi>sin</mi>
            <mrow>
              <mo fence="true" form="prefix" stretchy="false">(</mo>
              <mrow>
                <mrow>
                  <mfrac>
                    <mi>β</mi>
                    <mn>2</mn>
                  </mfrac>
                  <mi>d</mi>
                </mrow>
              </mrow>
              <mo fence="true" form="postfix" stretchy="false">)</mo>
            </mrow>
            <mstyle mathvariant="bold">
              <msubsup>
                <mi>a</mi>
                <mn>1</mn>
                <mi>,</mi>
              </msubsup>
            </mstyle>
          </mrow>
        </mrow>
        <mo fence="true" form="postfix" stretchy="false">⟩</mo>
      </mrow>
    </mrow>
    <annotation encoding="StarMath 5.0">bold p sub s = langle cos(%beta over 2 d), sin(%beta over 2 d) bold a^, sub 1 rangle </annotation>
  </semantics>
</math>
</file>