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tent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53b" officeooo:paragraph-rsid="0010553b"/>
    </style:style>
    <style:style style:name="P2" style:family="paragraph" style:parent-style-name="Standard">
      <style:text-properties officeooo:rsid="001803fa" officeooo:paragraph-rsid="001803fa"/>
    </style:style>
    <style:style style:name="P3" style:family="paragraph" style:parent-style-name="Standard">
      <style:text-properties officeooo:paragraph-rsid="0018a42f"/>
    </style:style>
    <style:style style:name="P4" style:family="paragraph" style:parent-style-name="Standard">
      <style:text-properties officeooo:rsid="001803fa" officeooo:paragraph-rsid="0018a42f"/>
    </style:style>
    <style:style style:name="T1" style:family="text">
      <style:text-properties officeooo:rsid="001803f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as-char" svg:y="-0.439cm" svg:width="3.104cm" svg:height="0.5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as-char" svg:y="-0.621cm" svg:width="5.69cm" svg:height="1.00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3" text:anchor-type="as-char" svg:y="-0.681cm" svg:width="8.167cm" svg:height="1.12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Object4" text:anchor-type="as-char" svg:y="-0.665cm" svg:width="4.419cm" svg:height="1.24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Object5" text:anchor-type="as-char" svg:y="-0.665cm" svg:width="4.44cm" svg:height="1.24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draw:frame draw:style-name="fr1" draw:name="Object6" text:anchor-type="as-char" svg:y="-0.665cm" svg:width="3.911cm" svg:height="1.24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P1">Isolate the terms that are dependent on the accelerations on the left hand side of the equation <text:span text:style-name="T1">for the modified Jacobian</text:span>. <text:span text:style-name="T1">The terms on the right hand side are the modified </text:span><text:span text:style-name="T1"><draw:frame draw:style-name="fr1" draw:name="Object10" text:anchor-type="as-char" svg:y="-0.379cm" svg:width="0.213cm" svg:height="0.47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.</text:span></text:p>
      <text:p text:style-name="P1"><draw:frame draw:style-name="fr1" draw:name="Object7" text:anchor-type="as-char" svg:y="-0.439cm" svg:width="9.541cm" svg:height="0.59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Object9" text:anchor-type="as-char" svg:y="-1.251cm" svg:width="10.079cm" svg:height="2.41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1" draw:name="Object8" text:anchor-type="as-char" svg:y="-0.478cm" svg:width="11.314cm" svg:height="0.63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P2">The Jacobian.</text:p>
      <text:p text:style-name="P3"><draw:frame draw:style-name="fr1" draw:name="Object11" text:anchor-type="as-char" svg:y="-0.439cm" svg:width="5.256cm" svg:height="0.59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"><draw:frame draw:style-name="fr1" draw:name="Object12" text:anchor-type="as-char" svg:y="-0.684cm" svg:width="4.078cm" svg:height="1.13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<draw:frame draw:style-name="fr1" draw:name="Object13" text:anchor-type="as-char" svg:y="-0.744cm" svg:width="7.752cm" svg:height="1.19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><draw:frame draw:style-name="fr1" draw:name="Object14" text:anchor-type="as-char" svg:y="-0.684cm" svg:width="5.059cm" svg:height="1.131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"><draw:frame draw:style-name="fr1" draw:name="Object15" text:anchor-type="as-char" svg:y="-0.684cm" svg:width="5.041cm" svg:height="1.131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4"><draw:frame draw:style-name="fr1" draw:name="Object16" text:anchor-type="as-char" svg:y="-0.439cm" svg:width="7.883cm" svg:height="0.594cm" draw:z-index="15"><draw:object xlink:href="./Object 16" xlink:type="simple" xlink:show="embed" xlink:actuate="onLoad"/><draw:image xlink:href="./ObjectReplacements/Object 16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1:53:23.306610268</meta:creation-date>
    <meta:generator>LibreOffice/26.2.3.2$Linux_X86_64 LibreOffice_project/d4d5ed47b6084125f28d269a5650105d54dde034</meta:generator>
    <dc:date>2026-06-17T14:56:29.768721599</dc:date>
    <meta:editing-duration>PT1H10M39S</meta:editing-duration>
    <meta:editing-cycles>8</meta:editing-cycles>
    <meta:document-statistic meta:table-count="0" meta:image-count="0" meta:object-count="16" meta:page-count="1" meta:paragraph-count="17" meta:word-count="51" meta:character-count="284" meta:non-whitespace-character-count="235"/>
  </office:meta>
</office:document-meta>
</file>

<file path=Object 1/content.xml><?xml version="1.0" encoding="utf-8"?>
<math xmlns="http://www.w3.org/1998/Math/MathML" display="block">
  <semantics>
    <mrow>
      <mrow>
        <mi>ϕ</mi>
        <mo stretchy="false">=</mo>
        <msup>
          <mrow>
            <mo fence="true" form="prefix" stretchy="false">(</mo>
            <mrow>
              <mrow>
                <mstyle mathvariant="bold">
                  <msub>
                    <mi>s</mi>
                    <mn>1</mn>
                  </msub>
                </mstyle>
                <mo stretchy="false">−</mo>
                <mstyle mathvariant="bold">
                  <msub>
                    <mi>s</mi>
                    <mn>2</mn>
                  </msub>
                </mstyle>
              </mrow>
            </mrow>
            <mo fence="true" form="postfix" stretchy="false">)</mo>
          </mrow>
          <mi>T</mi>
        </msup>
      </mrow>
      <mrow>
        <mstyle mathvariant="bold">
          <msub>
            <mi>u</mi>
            <mn>2</mn>
          </msub>
        </mstyle>
        <mo stretchy="false">=</mo>
        <mn>0</mn>
      </mrow>
    </mrow>
    <annotation encoding="StarMath 5.0">%phi = (bold s sub 1 - bold s sub 2 )^T bold u sub 2 = 0</annotation>
  </semantics>
</math>
</file>

<file path=Object 10/content.xml><?xml version="1.0" encoding="utf-8"?>
<math xmlns="http://www.w3.org/1998/Math/MathML" display="block">
  <semantics>
    <mi>γ</mi>
    <annotation encoding="StarMath 5.0">%gamma</annotation>
  </semantics>
</math>
</file>

<file path=Object 11/content.xml><?xml version="1.0" encoding="utf-8"?>
<math xmlns="http://www.w3.org/1998/Math/MathML" display="block">
  <semantics>
    <mrow>
      <mrow>
        <mi>ϕ</mi>
        <mo stretchy="false">=</mo>
        <msup>
          <mrow>
            <mo fence="true" form="prefix" stretchy="false">(</mo>
            <mrow>
              <mrow>
                <mstyle mathvariant="bold">
                  <msub>
                    <mi>s</mi>
                    <mn>1</mn>
                  </msub>
                </mstyle>
                <mo stretchy="false">−</mo>
                <mstyle mathvariant="bold">
                  <msub>
                    <mi>s</mi>
                    <mn>2</mn>
                  </msub>
                </mstyle>
              </mrow>
            </mrow>
            <mo fence="true" form="postfix" stretchy="false">)</mo>
          </mrow>
          <mi>T</mi>
        </msup>
      </mrow>
      <mrow>
        <mstyle mathvariant="bold">
          <msub>
            <mi>u</mi>
            <mn>2</mn>
          </msub>
        </mstyle>
        <mo stretchy="false">=</mo>
        <mstyle mathvariant="bold">
          <msubsup>
            <mi>u</mi>
            <mn>2</mn>
            <mi>T</mi>
          </msubsup>
        </mstyle>
      </mrow>
      <mrow>
        <mrow>
          <mo fence="true" form="prefix" stretchy="false">(</mo>
          <mrow>
            <mrow>
              <mstyle mathvariant="bold">
                <msub>
                  <mi>s</mi>
                  <mn>1</mn>
                </msub>
              </mstyle>
              <mo stretchy="false">−</mo>
              <mstyle mathvariant="bold">
                <msub>
                  <mi>s</mi>
                  <mn>2</mn>
                </msub>
              </mstyle>
            </mrow>
          </mrow>
          <mo fence="true" form="postfix" stretchy="false">)</mo>
        </mrow>
        <mo stretchy="false">=</mo>
        <mn>0</mn>
      </mrow>
    </mrow>
    <annotation encoding="StarMath 5.0">%phi = (bold s sub 1 - bold s sub 2 )^T bold u sub 2 = bold u^T sub 2 (bold s sub 1 - bold s sub 2)=0</annotation>
  </semantics>
</math>
</file>

<file path=Object 12/content.xml><?xml version="1.0" encoding="utf-8"?>
<math xmlns="http://www.w3.org/1998/Math/MathML" display="block">
  <semantics>
    <mrow>
      <mrow>
        <mfrac>
          <mrow>
            <mo stretchy="false">∂</mo>
            <mi>ϕ</mi>
          </mrow>
          <mrow>
            <mo stretchy="false">∂</mo>
            <mstyle mathvariant="bold">
              <msub>
                <mi>r</mi>
                <mn>1</mn>
              </msub>
            </mstyle>
          </mrow>
        </mfrac>
        <mo stretchy="false">=</mo>
        <mstyle mathvariant="bold">
          <msubsup>
            <mi>u</mi>
            <mn>2</mn>
            <mi>T</mi>
          </msubsup>
        </mstyle>
      </mrow>
      <mrow>
        <mfrac>
          <mrow>
            <mo stretchy="false">∂</mo>
            <mstyle mathvariant="bold">
              <msub>
                <mi>s</mi>
                <mn>1</mn>
              </msub>
            </mstyle>
          </mrow>
          <mrow>
            <mo stretchy="false">∂</mo>
            <mstyle mathvariant="bold">
              <msub>
                <mi>r</mi>
                <mn>1</mn>
              </msub>
            </mstyle>
          </mrow>
        </mfrac>
        <mo stretchy="false">=</mo>
        <mstyle mathvariant="bold">
          <msubsup>
            <mi>u</mi>
            <mn>2</mn>
            <mi>T</mi>
          </msubsup>
        </mstyle>
      </mrow>
      <mrow>
        <mstyle mathvariant="bold">
          <mi>I</mi>
        </mstyle>
        <mo stretchy="false">=</mo>
        <mstyle mathvariant="bold">
          <msubsup>
            <mi>u</mi>
            <mn>2</mn>
            <mi>T</mi>
          </msubsup>
        </mstyle>
      </mrow>
    </mrow>
    <annotation encoding="StarMath 5.0">{partial %phi}over{partial bold r sub 1}
=
bold u^T sub 2 {partial bold s sub 1}over{partial bold r sub 1}
=
bold u^T sub 2 bold I
=
bold u^T sub 2</annotation>
  </semantics>
</math>
</file>

<file path=Object 13/content.xml><?xml version="1.0" encoding="utf-8"?>
<math xmlns="http://www.w3.org/1998/Math/MathML" display="block">
  <semantics>
    <mrow>
      <mrow>
        <mfrac>
          <mrow>
            <mo stretchy="false">∂</mo>
            <mi>ϕ</mi>
          </mrow>
          <mrow>
            <mo stretchy="false">∂</mo>
            <mstyle mathvariant="bold">
              <msub>
                <mi>p</mi>
                <mn>1</mn>
              </msub>
            </mstyle>
          </mrow>
        </mfrac>
        <mo stretchy="false">=</mo>
        <mstyle mathvariant="bold">
          <msubsup>
            <mi>u</mi>
            <mn>2</mn>
            <mi>T</mi>
          </msubsup>
        </mstyle>
      </mrow>
      <mrow>
        <mfrac>
          <mrow>
            <mo stretchy="false">∂</mo>
            <mstyle mathvariant="bold">
              <msub>
                <mi>s</mi>
                <mn>1</mn>
              </msub>
            </mstyle>
          </mrow>
          <mrow>
            <mo stretchy="false">∂</mo>
            <mstyle mathvariant="bold">
              <msub>
                <mi>p</mi>
                <mn>1</mn>
              </msub>
            </mstyle>
          </mrow>
        </mfrac>
        <mo stretchy="false">=</mo>
        <mstyle mathvariant="bold">
          <msubsup>
            <mi>u</mi>
            <mn>2</mn>
            <mi>T</mi>
          </msubsup>
        </mstyle>
      </mrow>
      <mrow>
        <mfrac>
          <mrow>
            <mo stretchy="false">∂</mo>
            <mstyle mathvariant="bold">
              <msub>
                <mi>A</mi>
                <mn>1</mn>
              </msub>
            </mstyle>
            <mstyle mathvariant="bold">
              <msubsup>
                <mi>s</mi>
                <mn>1</mn>
                <mi>,</mi>
              </msubsup>
            </mstyle>
          </mrow>
          <mrow>
            <mo stretchy="false">∂</mo>
            <mstyle mathvariant="bold">
              <msub>
                <mi>p</mi>
                <mn>1</mn>
              </msub>
            </mstyle>
          </mrow>
        </mfrac>
        <mo stretchy="false">=</mo>
        <mn>2</mn>
      </mrow>
      <mstyle mathvariant="bold">
        <msubsup>
          <mi>u</mi>
          <mn>2</mn>
          <mi>T</mi>
        </msubsup>
      </mstyle>
      <mrow>
        <mo fence="true" form="prefix" stretchy="false">(</mo>
        <mrow>
          <mrow>
            <mstyle mathvariant="bold">
              <msub>
                <mi>G</mi>
                <mn>1</mn>
              </msub>
            </mstyle>
            <mrow>
              <mover accent="true">
                <mstyle mathvariant="bold">
                  <msubsup>
                    <mi>s</mi>
                    <mn>1</mn>
                    <mi>,</mi>
                  </msubsup>
                </mstyle>
                <mo>¯</mo>
              </mover>
              <mo stretchy="false">+</mo>
              <mstyle mathvariant="bold">
                <msubsup>
                  <mi>s</mi>
                  <mn>1</mn>
                  <mi>,</mi>
                </msubsup>
              </mstyle>
            </mrow>
            <mstyle mathvariant="bold">
              <msubsup>
                <mi>p</mi>
                <mn>1</mn>
                <mi>T</mi>
              </msubsup>
            </mstyle>
          </mrow>
        </mrow>
        <mo fence="true" form="postfix" stretchy="false">)</mo>
      </mrow>
    </mrow>
    <annotation encoding="StarMath 5.0">{partial %phi}over{partial bold p sub 1}
=
bold u^T sub 2 {partial bold s sub 1}over{partial bold p sub 1}
=
bold u^T sub 2 {partial bold A sub 1 bold s^, sub 1}over{partial bold p sub 1}
=
2 bold u^T sub 2 (bold G sub1 overline{bold s^, sub 1} + bold s^, sub 1 bold p^T sub 1)</annotation>
  </semantics>
</math>
</file>

<file path=Object 14/content.xml><?xml version="1.0" encoding="utf-8"?>
<math xmlns="http://www.w3.org/1998/Math/MathML" display="block">
  <semantics>
    <mrow>
      <mrow>
        <mfrac>
          <mrow>
            <mo stretchy="false">∂</mo>
            <mi>ϕ</mi>
          </mrow>
          <mrow>
            <mo stretchy="false">∂</mo>
            <mstyle mathvariant="bold">
              <msub>
                <mi>r</mi>
                <mn>2</mn>
              </msub>
            </mstyle>
          </mrow>
        </mfrac>
        <mo stretchy="false">=</mo>
        <mrow>
          <mo stretchy="false">−</mo>
          <mstyle mathvariant="bold">
            <msubsup>
              <mi>u</mi>
              <mn>2</mn>
              <mi>T</mi>
            </msubsup>
          </mstyle>
        </mrow>
      </mrow>
      <mrow>
        <mfrac>
          <mrow>
            <mo stretchy="false">∂</mo>
            <mstyle mathvariant="bold">
              <msub>
                <mi>s</mi>
                <mn>2</mn>
              </msub>
            </mstyle>
          </mrow>
          <mrow>
            <mo stretchy="false">∂</mo>
            <mstyle mathvariant="bold">
              <msub>
                <mi>r</mi>
                <mn>2</mn>
              </msub>
            </mstyle>
          </mrow>
        </mfrac>
        <mo stretchy="false">=</mo>
        <mrow>
          <mo stretchy="false">−</mo>
          <mstyle mathvariant="bold">
            <msubsup>
              <mi>u</mi>
              <mn>2</mn>
              <mi>T</mi>
            </msubsup>
          </mstyle>
        </mrow>
      </mrow>
      <mrow>
        <mstyle mathvariant="bold">
          <mi>I</mi>
        </mstyle>
        <mo stretchy="false">=</mo>
        <mrow>
          <mo stretchy="false">−</mo>
          <mstyle mathvariant="bold">
            <msubsup>
              <mi>u</mi>
              <mn>2</mn>
              <mi>T</mi>
            </msubsup>
          </mstyle>
        </mrow>
      </mrow>
    </mrow>
    <annotation encoding="StarMath 5.0">{partial %phi}over{partial bold r sub 2}
=
-bold u^T sub 2 {partial bold s sub 2}over{partial bold r sub 2}
=
-bold u^T sub 2 bold I
=
-bold u^T sub 2</annotation>
  </semantics>
</math>
</file>

<file path=Object 15/content.xml><?xml version="1.0" encoding="utf-8"?>
<math xmlns="http://www.w3.org/1998/Math/MathML" display="block">
  <semantics>
    <mrow>
      <mrow>
        <mfrac>
          <mrow>
            <mo stretchy="false">∂</mo>
            <mi>ϕ</mi>
          </mrow>
          <mrow>
            <mo stretchy="false">∂</mo>
            <mstyle mathvariant="bold">
              <msub>
                <mi>p</mi>
                <mn>2</mn>
              </msub>
            </mstyle>
          </mrow>
        </mfrac>
        <mo stretchy="false">=</mo>
        <msup>
          <mrow>
            <mo fence="true" form="prefix" stretchy="false">(</mo>
            <mrow>
              <mrow>
                <mstyle mathvariant="bold">
                  <msub>
                    <mi>s</mi>
                    <mn>1</mn>
                  </msub>
                </mstyle>
                <mo stretchy="false">−</mo>
                <mstyle mathvariant="bold">
                  <msub>
                    <mi>s</mi>
                    <mn>2</mn>
                  </msub>
                </mstyle>
              </mrow>
            </mrow>
            <mo fence="true" form="postfix" stretchy="false">)</mo>
          </mrow>
          <mi>T</mi>
        </msup>
      </mrow>
      <mrow>
        <mfrac>
          <mrow>
            <mo stretchy="false">∂</mo>
            <mstyle mathvariant="bold">
              <msub>
                <mi>u</mi>
                <mn>2</mn>
              </msub>
            </mstyle>
          </mrow>
          <mrow>
            <mo stretchy="false">∂</mo>
            <mstyle mathvariant="bold">
              <msub>
                <mi>p</mi>
                <mn>2</mn>
              </msub>
            </mstyle>
          </mrow>
        </mfrac>
        <mo stretchy="false">−</mo>
        <mstyle mathvariant="bold">
          <msubsup>
            <mi>u</mi>
            <mn>2</mn>
            <mi>T</mi>
          </msubsup>
        </mstyle>
      </mrow>
      <mfrac>
        <mrow>
          <mo stretchy="false">∂</mo>
          <mstyle mathvariant="bold">
            <msub>
              <mi>s</mi>
              <mn>2</mn>
            </msub>
          </mstyle>
        </mrow>
        <mrow>
          <mo stretchy="false">∂</mo>
          <mstyle mathvariant="bold">
            <msub>
              <mi>p</mi>
              <mn>2</mn>
            </msub>
          </mstyle>
        </mrow>
      </mfrac>
    </mrow>
    <annotation encoding="StarMath 5.0">{partial %phi}over{partial bold p sub 2}
=
(bold s sub 1 - bold s sub 2)^T {partial bold u sub 2}over{partial bold p sub 2}
-
bold u^T sub 2 {partial bold s sub 2}over{partial bold p sub 2}</annotation>
  </semantics>
</math>
</file>

<file path=Object 16/content.xml><?xml version="1.0" encoding="utf-8"?>
<math xmlns="http://www.w3.org/1998/Math/MathML" display="block">
  <semantics>
    <mrow>
      <mrow>
        <mrow/>
        <mo stretchy="false">=</mo>
        <mn>2</mn>
      </mrow>
      <msup>
        <mrow>
          <mo fence="true" form="prefix" stretchy="false">(</mo>
          <mrow>
            <mrow>
              <mstyle mathvariant="bold">
                <msub>
                  <mi>s</mi>
                  <mn>1</mn>
                </msub>
              </mstyle>
              <mo stretchy="false">−</mo>
              <mstyle mathvariant="bold">
                <msub>
                  <mi>s</mi>
                  <mn>2</mn>
                </msub>
              </mstyle>
            </mrow>
          </mrow>
          <mo fence="true" form="postfix" stretchy="false">)</mo>
        </mrow>
        <mi>T</mi>
      </msup>
      <mrow>
        <mrow>
          <mo fence="true" form="prefix" stretchy="false">(</mo>
          <mrow>
            <mrow>
              <mstyle mathvariant="bold">
                <msub>
                  <mi>G</mi>
                  <mn>2</mn>
                </msub>
              </mstyle>
              <mrow>
                <mover accent="true">
                  <mstyle mathvariant="bold">
                    <msubsup>
                      <mi>u</mi>
                      <mn>2</mn>
                      <mi>,</mi>
                    </msubsup>
                  </mstyle>
                  <mo>¯</mo>
                </mover>
                <mo stretchy="false">+</mo>
                <mstyle mathvariant="bold">
                  <msubsup>
                    <mi>u</mi>
                    <mn>2</mn>
                    <mi>,</mi>
                  </msubsup>
                </mstyle>
              </mrow>
              <mstyle mathvariant="bold">
                <msubsup>
                  <mi>p</mi>
                  <mn>2</mn>
                  <mi>T</mi>
                </msubsup>
              </mstyle>
            </mrow>
          </mrow>
          <mo fence="true" form="postfix" stretchy="false">)</mo>
        </mrow>
        <mo stretchy="false">−</mo>
        <mn>2</mn>
      </mrow>
      <mstyle mathvariant="bold">
        <msubsup>
          <mi>u</mi>
          <mn>2</mn>
          <mi>T</mi>
        </msubsup>
      </mstyle>
      <mrow>
        <mo fence="true" form="prefix" stretchy="false">(</mo>
        <mrow>
          <mrow>
            <mstyle mathvariant="bold">
              <msub>
                <mi>G</mi>
                <mn>2</mn>
              </msub>
            </mstyle>
            <mrow>
              <mover accent="true">
                <mstyle mathvariant="bold">
                  <msubsup>
                    <mi>s</mi>
                    <mn>2</mn>
                    <mi>,</mi>
                  </msubsup>
                </mstyle>
                <mo>¯</mo>
              </mover>
              <mo stretchy="false">+</mo>
              <mstyle mathvariant="bold">
                <msubsup>
                  <mi>s</mi>
                  <mn>2</mn>
                  <mi>,</mi>
                </msubsup>
              </mstyle>
            </mrow>
            <mstyle mathvariant="bold">
              <msubsup>
                <mi>p</mi>
                <mn>2</mn>
                <mi>T</mi>
              </msubsup>
            </mstyle>
          </mrow>
        </mrow>
        <mo fence="true" form="postfix" stretchy="false">)</mo>
      </mrow>
    </mrow>
    <annotation encoding="StarMath 5.0">{}=2(bold s sub 1 - bold s sub 2)^T
(bold G sub 2 overline{bold u^, sub 2} + bold u^, sub 2 bold p^T sub 2  )
-
2 bold u sub 2^T (bold G sub 2 overline{bold s^, sub 2} + bold s^, sub 2 bold p^T sub 2)</annotation>
  </semantics>
</math>
</file>

<file path=Object 2/content.xml><?xml version="1.0" encoding="utf-8"?>
<math xmlns="http://www.w3.org/1998/Math/MathML" display="block">
  <semantics>
    <mrow>
      <mrow>
        <mfrac>
          <mrow>
            <mi>d</mi>
            <mi>ϕ</mi>
          </mrow>
          <mi mathvariant="italic">dt</mi>
        </mfrac>
        <mo stretchy="false">=</mo>
        <msup>
          <mrow>
            <mo fence="true" form="prefix" stretchy="false">(</mo>
            <mrow>
              <mrow>
                <mover accent="true">
                  <mstyle mathvariant="bold">
                    <msub>
                      <mi>s</mi>
                      <mn>1</mn>
                    </msub>
                  </mstyle>
                  <mo stretchy="false">˙</mo>
                </mover>
                <mo stretchy="false">−</mo>
                <mover accent="true">
                  <mstyle mathvariant="bold">
                    <msub>
                      <mi>s</mi>
                      <mn>2</mn>
                    </msub>
                  </mstyle>
                  <mo stretchy="false">˙</mo>
                </mover>
              </mrow>
            </mrow>
            <mo fence="true" form="postfix" stretchy="false">)</mo>
          </mrow>
          <mi>T</mi>
        </msup>
      </mrow>
      <mrow>
        <mstyle mathvariant="bold">
          <msub>
            <mi>u</mi>
            <mn>2</mn>
          </msub>
        </mstyle>
        <mo stretchy="false">+</mo>
        <msup>
          <mrow>
            <mo fence="true" form="prefix" stretchy="false">(</mo>
            <mrow>
              <mrow>
                <mstyle mathvariant="bold">
                  <msub>
                    <mi>s</mi>
                    <mn>1</mn>
                  </msub>
                </mstyle>
                <mo stretchy="false">−</mo>
                <mstyle mathvariant="bold">
                  <msub>
                    <mi>s</mi>
                    <mn>2</mn>
                  </msub>
                </mstyle>
              </mrow>
            </mrow>
            <mo fence="true" form="postfix" stretchy="false">)</mo>
          </mrow>
          <mi>T</mi>
        </msup>
      </mrow>
      <mrow>
        <mover accent="true">
          <mstyle mathvariant="bold">
            <msub>
              <mi>u</mi>
              <mn>2</mn>
            </msub>
          </mstyle>
          <mo stretchy="false">˙</mo>
        </mover>
        <mo stretchy="false">=</mo>
        <mn>0</mn>
      </mrow>
    </mrow>
    <annotation encoding="StarMath 5.0">{d %phi} over {dt} = ( dot bold s sub 1 - dot bold s sub 2 )^T bold u sub 2
+ (bold s sub 1 - bold s sub 2)^T dot bold u sub 2
= 0</annotation>
  </semantics>
</math>
</file>

<file path=Object 3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ϕ</mi>
          </mrow>
          <msup>
            <mi mathvariant="italic">dt</mi>
            <mn>2</mn>
          </msup>
        </mfrac>
        <mo stretchy="false">=</mo>
        <mstyle mathvariant="bold">
          <msubsup>
            <mi>u</mi>
            <mn>2</mn>
            <mi>T</mi>
          </msubsup>
        </mstyle>
      </mrow>
      <mrow>
        <mrow>
          <mo fence="true" form="prefix" stretchy="false">(</mo>
          <mrow>
            <mrow>
              <mover accent="true">
                <mstyle mathvariant="bold">
                  <msub>
                    <mi>s</mi>
                    <mn>1</mn>
                  </msub>
                </mstyle>
                <mo stretchy="false">¨</mo>
              </mover>
              <mo stretchy="false">−</mo>
              <mover accent="true">
                <mstyle mathvariant="bold">
                  <msub>
                    <mi>s</mi>
                    <mn>2</mn>
                  </msub>
                </mstyle>
                <mo stretchy="false">¨</mo>
              </mover>
            </mrow>
          </mrow>
          <mo fence="true" form="postfix" stretchy="false">)</mo>
        </mrow>
        <mo stretchy="false">+</mo>
        <msup>
          <mrow>
            <mo fence="true" form="prefix" stretchy="false">(</mo>
            <mrow>
              <mrow>
                <mstyle mathvariant="bold">
                  <msub>
                    <mi>s</mi>
                    <mn>1</mn>
                  </msub>
                </mstyle>
                <mo stretchy="false">−</mo>
                <mstyle mathvariant="bold">
                  <msub>
                    <mi>s</mi>
                    <mn>2</mn>
                  </msub>
                </mstyle>
              </mrow>
            </mrow>
            <mo fence="true" form="postfix" stretchy="false">)</mo>
          </mrow>
          <mi>T</mi>
        </msup>
      </mrow>
      <mrow>
        <mover accent="true">
          <mstyle mathvariant="bold">
            <msub>
              <mi>u</mi>
              <mn>2</mn>
            </msub>
          </mstyle>
          <mo stretchy="false">¨</mo>
        </mover>
        <mo stretchy="false">+</mo>
        <mn>2</mn>
      </mrow>
      <msup>
        <mrow>
          <mo fence="true" form="prefix" stretchy="false">(</mo>
          <mrow>
            <mrow>
              <mover accent="true">
                <mstyle mathvariant="bold">
                  <msub>
                    <mi>s</mi>
                    <mn>1</mn>
                  </msub>
                </mstyle>
                <mo stretchy="false">˙</mo>
              </mover>
              <mo stretchy="false">−</mo>
              <mover accent="true">
                <mstyle mathvariant="bold">
                  <msub>
                    <mi>s</mi>
                    <mn>2</mn>
                  </msub>
                </mstyle>
                <mo stretchy="false">˙</mo>
              </mover>
            </mrow>
          </mrow>
          <mo fence="true" form="postfix" stretchy="false">)</mo>
        </mrow>
        <mi>T</mi>
      </msup>
      <mrow>
        <mover accent="true">
          <mstyle mathvariant="bold">
            <msub>
              <mi>u</mi>
              <mn>2</mn>
            </msub>
          </mstyle>
          <mo stretchy="false">˙</mo>
        </mover>
        <mo stretchy="false">=</mo>
        <mn>0</mn>
      </mrow>
    </mrow>
    <annotation encoding="StarMath 5.0">{d^2 %phi}over{dt^2} =
bold u sub 2^T( ddot bold s sub 1 - ddot bold s sub 2  )
+
(bold s sub 1 - bold s sub 2)^T ddot bold u sub 2
+
2(dot bold s sub 1 - dot bold s sub 2)^T dot bold u sub 2
= 
0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tyle mathvariant="bold">
                  <msub>
                    <mi>s</mi>
                    <mn>1</mn>
                  </msub>
                </mstyle>
                <mo stretchy="false">¨</mo>
              </mover>
              <mo stretchy="false">=</mo>
              <mrow>
                <mover accent="true">
                  <mstyle mathvariant="bold">
                    <msub>
                      <mi>r</mi>
                      <mn>1</mn>
                    </msub>
                  </mstyle>
                  <mo stretchy="false">¨</mo>
                </mover>
                <mo stretchy="false">+</mo>
                <mover accent="true">
                  <mstyle mathvariant="bold">
                    <msub>
                      <mi>A</mi>
                      <mn>1</mn>
                    </msub>
                  </mstyle>
                  <mo stretchy="false">¨</mo>
                </mover>
              </mrow>
            </mrow>
            <mstyle mathvariant="bold">
              <msubsup>
                <mi>s</mi>
                <mn>1</mn>
                <mi>,</mi>
              </msubsup>
            </mstyle>
          </mrow>
        </mtd>
      </mtr>
      <mtr>
        <mtd>
          <mrow>
            <mrow>
              <mrow/>
              <mo stretchy="false">=</mo>
              <mrow>
                <mover accent="true">
                  <mstyle mathvariant="bold">
                    <msub>
                      <mi>r</mi>
                      <mn>1</mn>
                    </msub>
                  </mstyle>
                  <mo stretchy="false">¨</mo>
                </mover>
                <mo stretchy="false">+</mo>
                <mn>2</mn>
              </mrow>
            </mrow>
            <mover accent="true">
              <mstyle mathvariant="bold">
                <msub>
                  <mi>G</mi>
                  <mn>1</mn>
                </msub>
              </mstyle>
              <mo stretchy="false">˙</mo>
            </mover>
            <mover accent="true">
              <mstyle mathvariant="bold">
                <msubsup>
                  <mi>L</mi>
                  <mn>1</mn>
                  <mi>T</mi>
                </msubsup>
              </mstyle>
              <mo stretchy="false">˙</mo>
            </mover>
            <mrow>
              <mstyle mathvariant="bold">
                <msubsup>
                  <mi>s</mi>
                  <mn>1</mn>
                  <mi>,</mi>
                </msubsup>
              </mstyle>
              <mo stretchy="false">+</mo>
              <mn>2</mn>
            </mrow>
            <mstyle mathvariant="bold">
              <msub>
                <mi>G</mi>
                <mn>1</mn>
              </msub>
            </mstyle>
            <mover accent="true">
              <mstyle mathvariant="bold">
                <msubsup>
                  <mi>s</mi>
                  <mn>1</mn>
                  <mi>,</mi>
                </msubsup>
              </mstyle>
              <mo>¯</mo>
            </mover>
            <mover accent="true">
              <mstyle mathvariant="bold">
                <msub>
                  <mi>p</mi>
                  <mn>1</mn>
                </msub>
              </mstyle>
              <mo stretchy="false">¨</mo>
            </mover>
          </mrow>
        </mtd>
      </mtr>
    </mtable>
    <annotation encoding="StarMath 5.0">alignl ddot bold s sub 1 = ddot bold r sub 1 + ddot bold A sub 1 bold s^, sub 1
newline
{} = ddot bold r sub 1 + 2 dot bold G sub 1 dot bold L^T sub 1 bold s^, sub 1
+ 2 bold G sub 1 overline {bold s^, sub 1} ddot bold p sub 1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tyle mathvariant="bold">
                  <msub>
                    <mi>s</mi>
                    <mn>2</mn>
                  </msub>
                </mstyle>
                <mo stretchy="false">¨</mo>
              </mover>
              <mo stretchy="false">=</mo>
              <mrow>
                <mover accent="true">
                  <mstyle mathvariant="bold">
                    <msub>
                      <mi>r</mi>
                      <mn>2</mn>
                    </msub>
                  </mstyle>
                  <mo stretchy="false">¨</mo>
                </mover>
                <mo stretchy="false">+</mo>
                <mover accent="true">
                  <mstyle mathvariant="bold">
                    <msub>
                      <mi>A</mi>
                      <mn>2</mn>
                    </msub>
                  </mstyle>
                  <mo stretchy="false">¨</mo>
                </mover>
              </mrow>
            </mrow>
            <mstyle mathvariant="bold">
              <msubsup>
                <mi>s</mi>
                <mn>2</mn>
                <mi>,</mi>
              </msubsup>
            </mstyle>
          </mrow>
        </mtd>
      </mtr>
      <mtr>
        <mtd>
          <mrow>
            <mrow>
              <mrow/>
              <mo stretchy="false">=</mo>
              <mrow>
                <mover accent="true">
                  <mstyle mathvariant="bold">
                    <msub>
                      <mi>r</mi>
                      <mn>2</mn>
                    </msub>
                  </mstyle>
                  <mo stretchy="false">¨</mo>
                </mover>
                <mo stretchy="false">+</mo>
                <mn>2</mn>
              </mrow>
            </mrow>
            <mover accent="true">
              <mstyle mathvariant="bold">
                <msub>
                  <mi>G</mi>
                  <mn>2</mn>
                </msub>
              </mstyle>
              <mo stretchy="false">˙</mo>
            </mover>
            <mover accent="true">
              <mstyle mathvariant="bold">
                <msubsup>
                  <mi>L</mi>
                  <mn>2</mn>
                  <mi>T</mi>
                </msubsup>
              </mstyle>
              <mo stretchy="false">˙</mo>
            </mover>
            <mrow>
              <mstyle mathvariant="bold">
                <msubsup>
                  <mi>s</mi>
                  <mn>2</mn>
                  <mi>,</mi>
                </msubsup>
              </mstyle>
              <mo stretchy="false">+</mo>
              <mn>2</mn>
            </mrow>
            <mstyle mathvariant="bold">
              <msub>
                <mi>G</mi>
                <mn>2</mn>
              </msub>
            </mstyle>
            <mover accent="true">
              <mstyle mathvariant="bold">
                <msubsup>
                  <mi>s</mi>
                  <mn>2</mn>
                  <mi>,</mi>
                </msubsup>
              </mstyle>
              <mo>¯</mo>
            </mover>
            <mover accent="true">
              <mstyle mathvariant="bold">
                <msub>
                  <mi>p</mi>
                  <mn>2</mn>
                </msub>
              </mstyle>
              <mo stretchy="false">¨</mo>
            </mover>
          </mrow>
        </mtd>
      </mtr>
    </mtable>
    <annotation encoding="StarMath 5.0">alignl ddot bold s sub 2 = ddot bold r sub 2 + ddot bold A sub 2 bold s^, sub 2
newline
{} = ddot bold r sub 2 + 2 dot bold G sub 2 dot bold L^T sub 2 bold s^, sub 2
+ 2 bold G sub 2 overline {bold s^, sub 2} ddot bold p sub 2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tyle mathvariant="bold">
                  <msub>
                    <mi>u</mi>
                    <mn>2</mn>
                  </msub>
                </mstyle>
                <mo stretchy="false">¨</mo>
              </mover>
              <mo stretchy="false">=</mo>
              <mover accent="true">
                <mstyle mathvariant="bold">
                  <msub>
                    <mi>A</mi>
                    <mn>2</mn>
                  </msub>
                </mstyle>
                <mo stretchy="false">¨</mo>
              </mover>
            </mrow>
            <mstyle mathvariant="bold">
              <msubsup>
                <mi>u</mi>
                <mn>2</mn>
                <mi>,</mi>
              </msubsup>
            </mstyle>
          </mrow>
        </mtd>
      </mtr>
      <mtr>
        <mtd>
          <mrow>
            <mrow>
              <mrow/>
              <mo stretchy="false">=</mo>
              <mn>2</mn>
            </mrow>
            <mover accent="true">
              <mstyle mathvariant="bold">
                <msub>
                  <mi>G</mi>
                  <mn>2</mn>
                </msub>
              </mstyle>
              <mo stretchy="false">˙</mo>
            </mover>
            <mover accent="true">
              <mstyle mathvariant="bold">
                <msubsup>
                  <mi>L</mi>
                  <mn>2</mn>
                  <mi>T</mi>
                </msubsup>
              </mstyle>
              <mo stretchy="false">˙</mo>
            </mover>
            <mrow>
              <mstyle mathvariant="bold">
                <msubsup>
                  <mi>u</mi>
                  <mn>2</mn>
                  <mi>,</mi>
                </msubsup>
              </mstyle>
              <mo stretchy="false">+</mo>
              <mn>2</mn>
            </mrow>
            <mstyle mathvariant="bold">
              <msub>
                <mi>G</mi>
                <mn>2</mn>
              </msub>
            </mstyle>
            <mover accent="true">
              <mstyle mathvariant="bold">
                <msubsup>
                  <mi>u</mi>
                  <mn>2</mn>
                  <mi>,</mi>
                </msubsup>
              </mstyle>
              <mo>¯</mo>
            </mover>
            <mover accent="true">
              <mstyle mathvariant="bold">
                <msub>
                  <mi>p</mi>
                  <mn>2</mn>
                </msub>
              </mstyle>
              <mo stretchy="false">¨</mo>
            </mover>
          </mrow>
        </mtd>
      </mtr>
    </mtable>
    <annotation encoding="StarMath 5.0">alignl ddot bold u sub 2 = ddot bold A sub 2 bold u^, sub 2
newline
{} =  2 dot bold G sub 2 dot bold L^T sub 2 bold u^, sub 2
+ 2 bold G sub 2 overline {bold u^, sub 2} ddot bold p sub 2</annotation>
  </semantics>
</math>
</file>

<file path=Object 7/content.xml><?xml version="1.0" encoding="utf-8"?>
<math xmlns="http://www.w3.org/1998/Math/MathML" display="block">
  <semantics>
    <mrow>
      <mstyle mathvariant="bold">
        <msubsup>
          <mi>u</mi>
          <mn>2</mn>
          <mi>T</mi>
        </msubsup>
      </mstyle>
      <mrow>
        <mrow>
          <mo fence="true" form="prefix" stretchy="false">(</mo>
          <mrow>
            <mrow>
              <mrow>
                <mover accent="true">
                  <mstyle mathvariant="bold">
                    <msub>
                      <mi>r</mi>
                      <mn>1</mn>
                    </msub>
                  </mstyle>
                  <mo stretchy="false">¨</mo>
                </mover>
                <mo stretchy="false">+</mo>
                <mn>2</mn>
              </mrow>
              <mstyle mathvariant="bold">
                <msub>
                  <mi>G</mi>
                  <mn>1</mn>
                </msub>
              </mstyle>
              <mover accent="true">
                <mstyle mathvariant="bold">
                  <msubsup>
                    <mi>s</mi>
                    <mn>1</mn>
                    <mi>,</mi>
                  </msubsup>
                </mstyle>
                <mo>¯</mo>
              </mover>
              <mrow>
                <mover accent="true">
                  <mstyle mathvariant="bold">
                    <msub>
                      <mi>p</mi>
                      <mn>1</mn>
                    </msub>
                  </mstyle>
                  <mo stretchy="false">¨</mo>
                </mover>
                <mo stretchy="false">−</mo>
                <mover accent="true">
                  <mstyle mathvariant="bold">
                    <msub>
                      <mi>r</mi>
                      <mn>2</mn>
                    </msub>
                  </mstyle>
                  <mo stretchy="false">¨</mo>
                </mover>
                <mo stretchy="false">−</mo>
                <mn>2</mn>
              </mrow>
              <mstyle mathvariant="bold">
                <msub>
                  <mi>G</mi>
                  <mn>2</mn>
                </msub>
              </mstyle>
              <mover accent="true">
                <mstyle mathvariant="bold">
                  <msubsup>
                    <mi>s</mi>
                    <mn>2</mn>
                    <mi>,</mi>
                  </msubsup>
                </mstyle>
                <mo>¯</mo>
              </mover>
              <mover accent="true">
                <mstyle mathvariant="bold">
                  <msub>
                    <mi>p</mi>
                    <mn>2</mn>
                  </msub>
                </mstyle>
                <mo stretchy="false">¨</mo>
              </mover>
            </mrow>
          </mrow>
          <mo fence="true" form="postfix" stretchy="false">)</mo>
        </mrow>
        <mo stretchy="false">+</mo>
        <msup>
          <mrow>
            <mo fence="true" form="prefix" stretchy="false">(</mo>
            <mrow>
              <mrow>
                <mstyle mathvariant="bold">
                  <msub>
                    <mi>s</mi>
                    <mn>1</mn>
                  </msub>
                </mstyle>
                <mo stretchy="false">−</mo>
                <mstyle mathvariant="bold">
                  <msub>
                    <mi>s</mi>
                    <mn>2</mn>
                  </msub>
                </mstyle>
              </mrow>
            </mrow>
            <mo fence="true" form="postfix" stretchy="false">)</mo>
          </mrow>
          <mi>T</mi>
        </msup>
      </mrow>
      <mn>2</mn>
      <mstyle mathvariant="bold">
        <msub>
          <mi>G</mi>
          <mn>2</mn>
        </msub>
      </mstyle>
      <mover accent="true">
        <mstyle mathvariant="bold">
          <msubsup>
            <mi>u</mi>
            <mn>2</mn>
            <mi>,</mi>
          </msubsup>
        </mstyle>
        <mo>¯</mo>
      </mover>
      <mrow>
        <mover accent="true">
          <mstyle mathvariant="bold">
            <msub>
              <mi>p</mi>
              <mn>2</mn>
            </msub>
          </mstyle>
          <mo stretchy="false">¨</mo>
        </mover>
        <mo stretchy="false">=</mo>
        <mi>γ</mi>
      </mrow>
    </mrow>
    <annotation encoding="StarMath 5.0">bold u sub 2^T
(ddot bold r sub 1 + 2 bold G sub 1 overline{bold s^, sub 1} ddot bold p sub 1 
- ddot bold r sub 2 - 2 bold G sub 2 overline{bold s^, sub 2} ddot bold p sub 2)
+
(bold s sub 1 - bold s sub 2)^T 
2 bold G sub 2 overline{bold u^, sub 2} ddot bold p sub 2
= %gamma
</annotation>
  </semantics>
</math>
</file>

<file path=Object 8/content.xml><?xml version="1.0" encoding="utf-8"?>
<math xmlns="http://www.w3.org/1998/Math/MathML" display="block">
  <semantics>
    <mrow>
      <mrow>
        <mi>γ</mi>
        <mo stretchy="false">=</mo>
        <mrow>
          <mo stretchy="false">−</mo>
          <mstyle mathvariant="bold">
            <msubsup>
              <mi>u</mi>
              <mn>2</mn>
              <mi>T</mi>
            </msubsup>
          </mstyle>
        </mrow>
      </mrow>
      <mrow>
        <mrow>
          <mo fence="true" form="prefix" stretchy="false">(</mo>
          <mrow>
            <mrow>
              <mn>2</mn>
              <mover accent="true">
                <mstyle mathvariant="bold">
                  <msub>
                    <mi>G</mi>
                    <mn>1</mn>
                  </msub>
                </mstyle>
                <mo stretchy="false">˙</mo>
              </mover>
              <mover accent="true">
                <mstyle mathvariant="bold">
                  <msubsup>
                    <mi>L</mi>
                    <mn>1</mn>
                    <mi>T</mi>
                  </msubsup>
                </mstyle>
                <mo stretchy="false">˙</mo>
              </mover>
              <mrow>
                <mstyle mathvariant="bold">
                  <msubsup>
                    <mi>s</mi>
                    <mn>1</mn>
                    <mi>,</mi>
                  </msubsup>
                </mstyle>
                <mo stretchy="false">−</mo>
                <mn>2</mn>
              </mrow>
              <mover accent="true">
                <mstyle mathvariant="bold">
                  <msub>
                    <mi>G</mi>
                    <mn>2</mn>
                  </msub>
                </mstyle>
                <mo stretchy="false">˙</mo>
              </mover>
              <mover accent="true">
                <mstyle mathvariant="bold">
                  <msubsup>
                    <mi>L</mi>
                    <mn>2</mn>
                    <mi>T</mi>
                  </msubsup>
                </mstyle>
                <mo stretchy="false">˙</mo>
              </mover>
              <mstyle mathvariant="bold">
                <msubsup>
                  <mi>s</mi>
                  <mn>2</mn>
                  <mi>,</mi>
                </msubsup>
              </mstyle>
            </mrow>
          </mrow>
          <mo fence="true" form="postfix" stretchy="false">)</mo>
        </mrow>
        <mo stretchy="false">−</mo>
        <msup>
          <mrow>
            <mo fence="true" form="prefix" stretchy="false">(</mo>
            <mrow>
              <mrow>
                <mstyle mathvariant="bold">
                  <msub>
                    <mi>s</mi>
                    <mn>1</mn>
                  </msub>
                </mstyle>
                <mo stretchy="false">−</mo>
                <mstyle mathvariant="bold">
                  <msub>
                    <mi>s</mi>
                    <mn>2</mn>
                  </msub>
                </mstyle>
              </mrow>
            </mrow>
            <mo fence="true" form="postfix" stretchy="false">)</mo>
          </mrow>
          <mi>T</mi>
        </msup>
      </mrow>
      <mn>2</mn>
      <mover accent="true">
        <mstyle mathvariant="bold">
          <msub>
            <mi>G</mi>
            <mn>2</mn>
          </msub>
        </mstyle>
        <mo stretchy="false">˙</mo>
      </mover>
      <mover accent="true">
        <mstyle mathvariant="bold">
          <msubsup>
            <mi>L</mi>
            <mn>2</mn>
            <mi>T</mi>
          </msubsup>
        </mstyle>
        <mo stretchy="false">˙</mo>
      </mover>
      <mrow>
        <mstyle mathvariant="bold">
          <msubsup>
            <mi>u</mi>
            <mn>2</mn>
            <mi>,</mi>
          </msubsup>
        </mstyle>
        <mo stretchy="false">−</mo>
        <mn>2</mn>
      </mrow>
      <msup>
        <mrow>
          <mo fence="true" form="prefix" stretchy="false">(</mo>
          <mrow>
            <mrow>
              <mover accent="true">
                <mstyle mathvariant="bold">
                  <msub>
                    <mi>s</mi>
                    <mn>1</mn>
                  </msub>
                </mstyle>
                <mo stretchy="false">˙</mo>
              </mover>
              <mo stretchy="false">−</mo>
              <mover accent="true">
                <mstyle mathvariant="bold">
                  <msub>
                    <mi>s</mi>
                    <mn>2</mn>
                  </msub>
                </mstyle>
                <mo stretchy="false">˙</mo>
              </mover>
            </mrow>
          </mrow>
          <mo fence="true" form="postfix" stretchy="false">)</mo>
        </mrow>
        <mi>T</mi>
      </msup>
      <mover accent="true">
        <mstyle mathvariant="bold">
          <msub>
            <mi>u</mi>
            <mn>2</mn>
          </msub>
        </mstyle>
        <mo stretchy="false">˙</mo>
      </mover>
    </mrow>
    <annotation encoding="StarMath 5.0">%gamma = 
-bold u sub 2^T
(2 dot bold G sub 1 dot bold L^T sub 1 bold s^, sub 1
-
2 dot bold G sub 2 dot bold L^T sub 2 bold s^, sub 2)
-
(bold s sub 1 - bold s sub 2)^T 
2 dot bold G sub 2 dot bold L^T sub 2 bold u^, sub 2
-
2(dot bold s sub 1 - dot bold s sub 2)^T dot bold u sub 2
</annotation>
  </semantics>
</math>
</file>

<file path=Object 9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tyle mathvariant="bold">
                  <msubsup>
                    <mi>u</mi>
                    <mn>2</mn>
                    <mi>T</mi>
                  </msubsup>
                </mstyle>
              </mtd>
              <mtd>
                <mrow>
                  <mn>2</mn>
                  <mstyle mathvariant="bold">
                    <msubsup>
                      <mi>u</mi>
                      <mn>2</mn>
                      <mi>T</mi>
                    </msubsup>
                  </mstyle>
                  <mstyle mathvariant="bold">
                    <msub>
                      <mi>G</mi>
                      <mn>1</mn>
                    </msub>
                  </mstyle>
                  <mover accent="true">
                    <mstyle mathvariant="bold">
                      <msubsup>
                        <mi>s</mi>
                        <mn>1</mn>
                        <mi>,</mi>
                      </msubsup>
                    </mstyle>
                    <mo>¯</mo>
                  </mover>
                </mrow>
              </mtd>
              <mtd>
                <mrow>
                  <mo stretchy="false">−</mo>
                  <mstyle mathvariant="bold">
                    <msubsup>
                      <mi>u</mi>
                      <mn>2</mn>
                      <mi>T</mi>
                    </msubsup>
                  </mstyle>
                </mrow>
              </mtd>
              <mtd>
                <mrow>
                  <mn>2</mn>
                  <mrow>
                    <mo fence="true" form="prefix" stretchy="false">(</mo>
                    <mrow>
                      <mrow>
                        <msup>
                          <mrow>
                            <mo fence="true" form="prefix" stretchy="false">(</mo>
                            <mrow>
                              <mrow>
                                <mstyle mathvariant="bold">
                                  <msub>
                                    <mi>s</mi>
                                    <mn>1</mn>
                                  </msub>
                                </mstyle>
                                <mo stretchy="false">−</mo>
                                <mstyle mathvariant="bold">
                                  <msub>
                                    <mi>s</mi>
                                    <mn>2</mn>
                                  </msub>
                                </mstyle>
                              </mrow>
                            </mrow>
                            <mo fence="true" form="postfix" stretchy="false">)</mo>
                          </mrow>
                          <mi>T</mi>
                        </msup>
                        <mstyle mathvariant="bold">
                          <msub>
                            <mi>G</mi>
                            <mn>2</mn>
                          </msub>
                        </mstyle>
                        <mrow>
                          <mover accent="true">
                            <mstyle mathvariant="bold">
                              <msubsup>
                                <mi>u</mi>
                                <mn>2</mn>
                                <mi>,</mi>
                              </msubsup>
                            </mstyle>
                            <mo>¯</mo>
                          </mover>
                          <mo stretchy="false">−</mo>
                          <mstyle mathvariant="bold">
                            <msubsup>
                              <mi>u</mi>
                              <mn>2</mn>
                              <mi>T</mi>
                            </msubsup>
                          </mstyle>
                        </mrow>
                        <mstyle mathvariant="bold">
                          <msub>
                            <mi>G</mi>
                            <mn>2</mn>
                          </msub>
                        </mstyle>
                        <mover accent="true">
                          <mstyle mathvariant="bold">
                            <msubsup>
                              <mi>s</mi>
                              <mn>2</mn>
                              <mi>,</mi>
                            </msubsup>
                          </mstyle>
                          <mo>¯</mo>
                        </mover>
                      </mrow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over accent="true">
                    <mstyle mathvariant="bold">
                      <msub>
                        <mi>r</mi>
                        <mn>1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r</mi>
                        <mn>2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p</mi>
                        <mn>2</mn>
                      </msub>
                    </mstyle>
                    <mo stretchy="false">¨</mo>
                  </mover>
                </mtd>
              </mtr>
            </mtable>
          </mrow>
          <mo fence="true" form="postfix" stretchy="true">]</mo>
        </mrow>
        <mo stretchy="false">=</mo>
        <mi>γ</mi>
      </mrow>
    </mrow>
    <annotation encoding="StarMath 5.0">left [ matrix{
	bold u^T sub 2 
	#
	2 bold u^T sub 2 bold G sub 1 overline{bold s^, sub 1}
	#
	-bold u^T sub 2
	#
	2((bold s sub 1 - bold s sub 2)^T bold G sub 2 overline{bold u^, sub 2}
- bold u^T sub 2 bold G sub 2 overline{bold s^, sub 2})

} right ]

left [ stack{ddot bold r sub 1 # ddot bold p sub 1 # ddot bold r sub 2 # ddot bold p sub 2}  right ] 
= %gamma</annotation>
  </semantics>
</math>
</file>